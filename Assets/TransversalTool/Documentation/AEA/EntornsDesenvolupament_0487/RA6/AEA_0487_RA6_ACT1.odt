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7 Entorns de desenvolupament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487_RA6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Diagrama de comportament del generador de paquets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6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Modelatge del flux d'execució del package generator amb diagrama de seqüència/estat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6</text:p>
          </table:table-cell>
          <table:table-cell table:style-name="TableCell43" table:number-columns-spanned="3">
            <text:p text:style-name="P44">- Selecciona eines i tècniques adequades a la fase de desenvolupament.</text:p>
            <text:p text:style-name="P44">- Aplica verificació/optimització o modelatge amb criteri tècnic.</text:p>
            <text:p text:style-name="P44">- Comunica el procés i els resultats de forma clara.</text:p>
          </table:table-cell>
          <table:covered-table-cell/>
          <table:covered-table-cell/>
          <table:table-cell table:style-name="TableCell45" table:number-rows-spanned="3">
            <text:p text:style-name="P46">- IDE i depuració</text:p>
            <text:p text:style-name="P46">- Testing i optimització</text:p>
            <text:p text:style-name="P46">- Modelatge UML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EntornsDesenvolupament_0487/RA6/AEA_0487_RA6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: Entorns Desenvolupament 0487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