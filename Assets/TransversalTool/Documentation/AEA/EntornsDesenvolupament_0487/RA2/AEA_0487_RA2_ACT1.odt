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Avaluació de l'IDE i configuració de dep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omparació de configuracions d'IDE i definició d'un flux eficient d'edició-compil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2/AEA_0487_RA2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Entorns Desenvolupament 0487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