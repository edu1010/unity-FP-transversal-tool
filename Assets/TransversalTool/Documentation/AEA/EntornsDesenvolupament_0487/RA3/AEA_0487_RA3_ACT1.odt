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Disseny i execució de proves funcional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Planificació de casos de prova per scripts i verificació de comportament en esce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3/AEA_0487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Entorns Desenvolupament 0487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