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Diagrama de classes del nucli de la too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Generació i revisió de diagrama de classes de components princip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5/AEA_0487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