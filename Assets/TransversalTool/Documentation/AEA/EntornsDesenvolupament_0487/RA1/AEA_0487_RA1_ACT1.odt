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Fases i eines del projecte transversal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Identificació de fases de desenvolupament i eines utilitzades en el projecte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1/AEA_0487_RA1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