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4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Optimització i perfilat de codi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plicació de tècniques d'optimització i lectura de resultats del profile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4/AEA_0487_RA4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