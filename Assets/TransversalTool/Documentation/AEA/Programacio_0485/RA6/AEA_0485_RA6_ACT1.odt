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Gestió de col·leccions de partid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Ús de llistes i diccionaris per gestionar partides guardades i filtratge per puntuació o da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6/AEA_0485_RA6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