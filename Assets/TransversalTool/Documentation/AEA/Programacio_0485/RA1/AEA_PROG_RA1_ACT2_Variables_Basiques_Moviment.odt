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riables bàsiques aplicades al movimen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la diferència entre int, float i bool partint d’un script de moviment do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diferents tipus de variables i la utilitat de cadascun.</text:p>
            <text:p text:style-name="P44">- Modifica codi per crear i fer servir variables.</text:p>
            <text:p text:style-name="P44">- Comprova conversions de tipus i efecte en execució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Variables int, float i bool.</text:p>
            <text:p text:style-name="P46">- Inspector de Unity i serialització bàsica.</text:p>
            <text:p text:style-name="P46">- Operadors i condicions simples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viment bàsic implementat i ús de l’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i repàs de tipus bàsic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xplic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de l’script donat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dirigida</text:p>
          </table:table-cell>
          <table:table-cell table:style-name="TableCell110">
            <text:p text:style-name="P111">Script base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Edició de variables i prove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de canvis a Play Mode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Experimentació</text:p>
          </table:table-cell>
          <table:table-cell table:style-name="TableCell136">
            <text:p text:style-name="P137">Escena tes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osada en comú d’errors típic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1_Variables.md</text:p>
            <text:p text:style-name="P168">- TransversalVariableBasics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simple de codi</text:p>
            <text:p text:style-name="P172">- Checklist de funcionament</text:p>
            <text:p text:style-name="P172">- Observació direc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</text:p>
            <text:p text:style-name="P176">- Suport en parelles</text:p>
            <text:p text:style-name="P176">- Ampliació opcional amb booleans addiciona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