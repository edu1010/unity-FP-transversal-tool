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Moviment bàsic del personatge en Unity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 (2 sessions de 3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implementa un script en C# per al moviment del personatge al pla XZ dins del projecte base de Unity. L'activitat integra lectura d'entrada, variables de velocitat i validació del funcionament en mode Pla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 (Educació de qualitat), ODS 8 (Treball digne i creixement econòmic), ODS 9 (Indústria, innovació i infraestructura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: Reconeix l'estructura d'un programa informàtic, identificant i relacionant els elements propis del llenguatge de programació utilitzat.</text:p>
          </table:table-cell>
          <table:table-cell table:style-name="TableCell43" table:number-columns-spanned="3">
            <text:p text:style-name="P44">- Identifica els blocs que componen l'estructura d'un programa informàtic.</text:p>
            <text:p text:style-name="P44">- Crea projectes de desenvolupament d'aplicacions.</text:p>
            <text:p text:style-name="P44">- Utilitza entorns integrats de desenvolupament.</text:p>
            <text:p text:style-name="P44">- Identifica els diferents tipus de variables i la utilitat específica de cadascun.</text:p>
            <text:p text:style-name="P44">- Modifica el codi d'un programa per crear i fer servir variables.</text:p>
            <text:p text:style-name="P44">- Crea i utilitza constants i literals.</text:p>
            <text:p text:style-name="P44">- Classifica i utilitza operadors del llenguatge en expressions.</text:p>
            <text:p text:style-name="P44">- Comprova conversions de tipus explícites i implícites.</text:p>
            <text:p text:style-name="P44">- Introdueix comentaris al codi.</text:p>
          </table:table-cell>
          <table:covered-table-cell/>
          <table:covered-table-cell/>
          <table:table-cell table:style-name="TableCell45" table:number-rows-spanned="3">
            <text:p text:style-name="P46">- Estructura i blocs fonamentals d'un script C# a Unity.</text:p>
            <text:p text:style-name="P46">- Variables, constants, literals, operadors i expressions.</text:p>
            <text:p text:style-name="P46">- Conversió de tipus i comentaris en codi.</text:p>
            <text:p text:style-name="P46">- Ús de l'IDE (Visual Studio o Rider) integrat amb Unity.</text:p>
          </table:table-cell>
          <table:table-cell table:style-name="TableCell47" table:number-columns-spanned="2" table:number-rows-spanned="3">
            <text:p text:style-name="P48">- Competència digital.</text:p>
            <text:p text:style-name="P48">- Resolució de problemes.</text:p>
            <text:p text:style-name="P48">- Treball en equip.</text:p>
            <text:p text:style-name="P48">- Aprenentatge autònom.</text:p>
            <text:p text:style-name="P48">- Pensament crític.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funcionals i mantenibles; resoldre incidències tècniques; col·laborar en equips de treball; comunicar i documentar solucions tècniques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fonaments de programació orientada a objectes, crear aplicacions funcionals, verificar i depurar codi, i integrar bones pràctiques de qualitat en el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bàsics de sintaxi C#, ús bàsic de Unity Editor, compilació de scripts i ús elemental de variables i operador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 i anàlisi del codi plantilla.</text:p>
          </table:table-cell>
          <table:table-cell table:style-name="TableCell91">
            <text:p text:style-name="P92">Gran grup + parelles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Activació de coneixements previs</text:p>
          </table:table-cell>
          <table:table-cell table:style-name="TableCell97">
            <text:p text:style-name="P98">Projector, enunciat, Unity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Configuració del projecte i edició de l'script de moviment.</text:p>
          </table:table-cell>
          <table:table-cell table:style-name="TableCell104">
            <text:p text:style-name="P105">Treball individual guiat</text:p>
          </table:table-cell>
          <table:table-cell table:style-name="TableCell106" table:number-columns-spanned="2">
            <text:p text:style-name="P107">60 min</text:p>
          </table:table-cell>
          <table:covered-table-cell/>
          <table:table-cell table:style-name="TableCell108">
            <text:p text:style-name="P109">Demostració + pràctica guiada</text:p>
          </table:table-cell>
          <table:table-cell table:style-name="TableCell110">
            <text:p text:style-name="P111">PC, Unity, IDE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Implementació de lectura d'entrada i desplaçament al pla XZ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60 min</text:p>
          </table:table-cell>
          <table:covered-table-cell/>
          <table:table-cell table:style-name="TableCell121">
            <text:p text:style-name="P122">Aprenentatge basat en tasques</text:p>
          </table:table-cell>
          <table:table-cell table:style-name="TableCell123">
            <text:p text:style-name="P124">TransversalPlayerMovementTemplate.cs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Proves, depuració i ajust de velocitat.</text:p>
          </table:table-cell>
          <table:table-cell table:style-name="TableCell130">
            <text:p text:style-name="P131">Individual amb suport docent</text:p>
          </table:table-cell>
          <table:table-cell table:style-name="TableCell132" table:number-columns-spanned="2">
            <text:p text:style-name="P133">45 min</text:p>
          </table:table-cell>
          <table:covered-table-cell/>
          <table:table-cell table:style-name="TableCell134">
            <text:p text:style-name="P135">Pràctica iterativa amb feedback</text:p>
          </table:table-cell>
          <table:table-cell table:style-name="TableCell136">
            <text:p text:style-name="P137">Mode Play, consola Unity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visió entre iguals i millores finals del codi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 curta de revisió</text:p>
          </table:table-cell>
          <table:table-cell table:style-name="TableCell151">
            <text:p text:style-name="P152">Aula informàtica</text:p>
          </table:table-cell>
        </table:table-row>
        <table:table-row table:style-name="TableRow153">
          <table:table-cell table:style-name="TableCell154">
            <text:p text:style-name="P155">Lliurament i autoavaluació breu.</text:p>
          </table:table-cell>
          <table:table-cell table:style-name="TableCell156">
            <text:p text:style-name="P157">Individual + gran grup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Metacognició</text:p>
          </table:table-cell>
          <table:table-cell table:style-name="TableCell162">
            <text:p text:style-name="P163">Formulari i checklist</text:p>
          </table:table-cell>
          <table:table-cell table:style-name="TableCell164">
            <text:p text:style-name="P165">Aula taller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nunciat: Assets/TransversalTool/Documentation/Statements/Programming_RA1.md</text:p>
            <text:p text:style-name="P168">- Plantilla alumne: Assets/TransversalTool/Templates/Student/Programming/TransversalPlayerMovementTemplate.cs</text:p>
            <text:p text:style-name="P168">- Solució professorat: Assets/TransversalTool/Templates/Teacher/Programming/TransversalPlayerMovementSolution.cs</text:p>
            <text:p text:style-name="P168">- Guia Unity: https://www.notion.so/Unity-30f6d409c061809b99a5f3eac550d797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codi (estructura, variables, operadors, comentaris).</text:p>
            <text:p text:style-name="P172">- Llista de verificació de funcionament en mode Play.</text:p>
            <text:p text:style-name="P172">- Observació directa del procés de resolució i depuració.</text:p>
            <text:p text:style-name="P172">- Autoavaluació breu de l'alumn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codi parcial i comentaris guia.</text:p>
            <text:p text:style-name="P176">- Suport visual pas a pas per a alumnat amb dificultats inicials.</text:p>
            <text:p text:style-name="P176">- Treball cooperatiu en parelles amb rols definits.</text:p>
            <text:p text:style-name="P176">- Ampliació opcional: moviment diagonal suavitzat i límit de veloc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