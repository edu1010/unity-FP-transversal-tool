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ns1="urn:oasis:names:tc:opendocument:xmlns:style:1.0" xmlns:ns2="urn:oasis:names:tc:opendocument:xmlns:svg-compatible:1.0" xmlns:ns3="urn:oasis:names:tc:opendocument:xmlns:xsl-fo-compatible:1.0" xmlns:office="urn:oasis:names:tc:opendocument:xmlns:office:1.0" xmlns:table="urn:oasis:names:tc:opendocument:xmlns:table:1.0" xmlns:text="urn:oasis:names:tc:opendocument:xmlns:text:1.0" office:version="1.4">
  <office:font-face-decls>
    <ns1:font-face ns1:name="Liberation Serif" ns2:font-family="Liberation Serif" ns1:font-family-generic="roman" ns1:font-pitch="variable" ns2:panose-1="2 2 6 3 5 4 5 2 3 4"/>
    <ns1:font-face ns1:name="DejaVu Sans" ns2:font-family="DejaVu Sans" ns1:font-family-generic="swiss" ns1:font-pitch="variable" ns2:panose-1="2 11 6 3 3 8 4 2 2 4"/>
    <ns1:font-face ns1:name="Times New Roman" ns2:font-family="Times New Roman" ns1:font-family-generic="roman" ns1:font-pitch="variable" ns2:panose-1="2 2 6 3 5 4 5 2 3 4"/>
    <ns1:font-face ns1:name="Liberation Sans" ns2:font-family="Liberation Sans" ns1:font-family-generic="swiss" ns1:font-pitch="variable" ns2:panose-1="2 11 6 4 2 2 2 2 2 4"/>
    <ns1:font-face ns1:name="Arial" ns2:font-family="Arial" ns1:font-family-generic="swiss" ns1:font-pitch="variable" ns2:panose-1="2 11 6 4 2 2 2 2 2 4"/>
    <ns1:font-face ns1:name="Times" ns2:font-family="Times" ns1:font-family-generic="roman" ns1:font-pitch="variable" ns2:panose-1="2 2 6 3 5 4 5 2 3 4"/>
    <ns1:font-face ns1:name="OpenSymbol" ns2:font-family="OpenSymbol" ns1:font-family-generic="system" ns1:font-pitch="variable" ns2:panose-1="5 1 0 0 0 0 0 0 0 0"/>
    <ns1:font-face ns1:name="Aptos Display" ns2:font-family="Aptos Display" ns1:font-family-generic="swiss" ns1:font-pitch="variable"/>
    <ns1:font-face ns1:name="Aptos" ns2:font-family="Aptos" ns1:font-family-generic="swiss" ns1:font-pitch="variable"/>
  </office:font-face-decls>
  <office:automatic-styles>
    <ns1:style ns1:name="P1" ns1:parent-style-name="Contents1" ns1:master-page-name="MP0" ns1:family="paragraph">
      <ns1:paragraph-properties ns3:break-before="page" ns3:margin-left="-0.0986in">
        <ns1:tab-stops>
          <ns1:tab-stop ns1:type="right" ns1:leader-style="dotted" ns1:leader-text="." ns1:position="6.7923in"/>
        </ns1:tab-stops>
      </ns1:paragraph-properties>
      <ns1:text-properties ns3:font-weight="bold" ns1:font-weight-asian="bold" ns1:font-weight-complex="bold"/>
    </ns1:style>
    <ns1:style ns1:name="TableColumn4" ns1:family="table-column">
      <ns1:table-column-properties ns1:column-width="1.809in" ns1:use-optimal-column-width="false"/>
    </ns1:style>
    <ns1:style ns1:name="TableColumn5" ns1:family="table-column">
      <ns1:table-column-properties ns1:column-width="0.9847in" ns1:use-optimal-column-width="false"/>
    </ns1:style>
    <ns1:style ns1:name="TableColumn6" ns1:family="table-column">
      <ns1:table-column-properties ns1:column-width="0.5256in" ns1:use-optimal-column-width="false"/>
    </ns1:style>
    <ns1:style ns1:name="TableColumn7" ns1:family="table-column">
      <ns1:table-column-properties ns1:column-width="0.5819in" ns1:use-optimal-column-width="false"/>
    </ns1:style>
    <ns1:style ns1:name="TableColumn8" ns1:family="table-column">
      <ns1:table-column-properties ns1:column-width="0.9659in" ns1:use-optimal-column-width="false"/>
    </ns1:style>
    <ns1:style ns1:name="TableColumn9" ns1:family="table-column">
      <ns1:table-column-properties ns1:column-width="0.8048in" ns1:use-optimal-column-width="false"/>
    </ns1:style>
    <ns1:style ns1:name="TableColumn10" ns1:family="table-column">
      <ns1:table-column-properties ns1:column-width="0.9673in" ns1:use-optimal-column-width="false"/>
    </ns1:style>
    <ns1:style ns1:name="Table3" ns1:family="table">
      <ns1:table-properties ns1:width="6.6395in" ns3:margin-left="-0.1222in" table:align="left"/>
    </ns1:style>
    <ns1:style ns1:name="TableRow11" ns1:family="table-row">
      <ns1:table-row-properties ns1:use-optimal-row-height="false" ns3:keep-together="always"/>
    </ns1:style>
    <ns1:style ns1:name="TableCell12" ns1:family="table-cell">
      <ns1:table-cell-properties ns3:border="0.0069in solid #000000" ns1:writing-mode="lr-tb" ns3:padding-top="0in" ns3:padding-left="0.075in" ns3:padding-bottom="0in" ns3:padding-right="0.075in"/>
    </ns1:style>
    <ns1:style ns1:name="P1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14" ns1:family="table-cell">
      <ns1:table-cell-properties ns3:border="0.0069in solid #000000" ns1:writing-mode="lr-tb" ns3:padding-top="0in" ns3:padding-left="0.075in" ns3:padding-bottom="0in" ns3:padding-right="0.075in"/>
    </ns1:style>
    <ns1:style ns1:name="P1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16" ns1:family="table-row">
      <ns1:table-row-properties ns1:use-optimal-row-height="false"/>
    </ns1:style>
    <ns1:style ns1:name="TableCell17" ns1:family="table-cell">
      <ns1:table-cell-properties ns3:border="0.0069in solid #000000" ns1:writing-mode="lr-tb" ns3:padding-top="0in" ns3:padding-left="0.075in" ns3:padding-bottom="0in" ns3:padding-right="0.075in"/>
    </ns1:style>
    <ns1:style ns1:name="P18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19" ns1:family="table-cell">
      <ns1:table-cell-properties ns3:border="0.0069in solid #000000" ns1:writing-mode="lr-tb" ns3:padding-top="0in" ns3:padding-left="0.075in" ns3:padding-bottom="0in" ns3:padding-right="0.075in"/>
    </ns1:style>
    <ns1:style ns1:name="P20" ns1:parent-style-name="NormalTextdoc" ns1:family="paragraph">
      <ns1:paragraph-properties ns3:margin-top="0.0791in" ns3:margin-bottom="0.0791in"/>
    </ns1:style>
    <ns1:style ns1:name="T21" ns1:parent-style-name="Fuentedepárrafopredeter." ns1:family="text">
      <ns1:text-properties ns1:font-name-complex="Arial" ns3:font-weight="bold" ns1:font-weight-asian="bold" ns3:font-size="9pt" ns1:font-size-asian="9pt" ns1:font-size-complex="9pt"/>
    </ns1:style>
    <ns1:style ns1:name="T22" ns1:parent-style-name="Fuentedepárrafopredeter." ns1:family="text">
      <ns1:text-properties ns1:font-name-complex="Arial" ns3:font-size="9pt" ns1:font-size-asian="9pt" ns1:font-size-complex="9pt"/>
    </ns1:style>
    <ns1:style ns1:name="TableRow23" ns1:family="table-row">
      <ns1:table-row-properties ns1:min-row-height="0.5958in" ns1:use-optimal-row-height="false"/>
    </ns1:style>
    <ns1:style ns1:name="TableCell24" ns1:family="table-cell">
      <ns1:table-cell-properties ns3:border="0.0069in solid #000000" ns1:writing-mode="lr-tb" ns3:padding-top="0in" ns3:padding-left="0.075in" ns3:padding-bottom="0in" ns3:padding-right="0.075in"/>
    </ns1:style>
    <ns1:style ns1:name="P2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26" ns1:family="table-row">
      <ns1:table-row-properties ns1:min-row-height="0.5958in" ns1:use-optimal-row-height="false"/>
    </ns1:style>
    <ns1:style ns1:name="TableCell27" ns1:family="table-cell">
      <ns1:table-cell-properties ns3:border-top="none" ns3:border-left="0.0069in solid #000000" ns3:border-bottom="0.0069in solid #000000" ns3:border-right="0.0069in solid #000000" ns1:writing-mode="lr-tb" ns3:padding-top="0in" ns3:padding-left="0.075in" ns3:padding-bottom="0in" ns3:padding-right="0.075in"/>
    </ns1:style>
    <ns1:style ns1:name="P28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29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30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31" ns1:family="table-row">
      <ns1:table-row-properties ns1:use-optimal-row-height="false"/>
    </ns1:style>
    <ns1:style ns1:name="TableCell32" ns1:family="table-cell">
      <ns1:table-cell-properties ns3:border="0.0069in solid #000000" ns1:writing-mode="lr-tb" ns3:padding-top="0in" ns3:padding-left="0.075in" ns3:padding-bottom="0in" ns3:padding-right="0.075in"/>
    </ns1:style>
    <ns1:style ns1:name="P3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34" ns1:family="table-cell">
      <ns1:table-cell-properties ns3:border="0.0069in solid #000000" ns1:writing-mode="lr-tb" ns3:padding-top="0in" ns3:padding-left="0.075in" ns3:padding-bottom="0in" ns3:padding-right="0.075in"/>
    </ns1:style>
    <ns1:style ns1:name="P3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36" ns1:family="table-cell">
      <ns1:table-cell-properties ns3:border="0.0069in solid #000000" ns1:writing-mode="lr-tb" ns3:padding-top="0in" ns3:padding-left="0.075in" ns3:padding-bottom="0in" ns3:padding-right="0.075in"/>
    </ns1:style>
    <ns1:style ns1:name="P37" ns1:parent-style-name="NormalTextdoc" ns1:family="paragraph">
      <ns1:paragraph-properties ns3:margin-top="0.0791in" ns3:margin-bottom="0.0791in"/>
      <ns1:text-properties ns1:font-name-complex="Arial" ns3:font-weight="bold" ns1:font-weight-asian="bold" ns1:font-weight-complex="bold" ns3:font-size="9pt" ns1:font-size-asian="9pt" ns1:font-size-complex="9pt"/>
    </ns1:style>
    <ns1:style ns1:name="TableCell38" ns1:family="table-cell">
      <ns1:table-cell-properties ns3:border="0.0069in solid #000000" ns1:writing-mode="lr-tb" ns3:padding-top="0in" ns3:padding-left="0.075in" ns3:padding-bottom="0in" ns3:padding-right="0.075in"/>
    </ns1:style>
    <ns1:style ns1:name="P39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40" ns1:family="table-row">
      <ns1:table-row-properties ns1:use-optimal-row-height="false"/>
    </ns1:style>
    <ns1:style ns1:name="TableCell41" ns1:family="table-cell">
      <ns1:table-cell-properties ns3:border="0.0069in solid #000000" ns1:writing-mode="lr-tb" ns3:padding-top="0in" ns3:padding-left="0.075in" ns3:padding-bottom="0in" ns3:padding-right="0.075in"/>
    </ns1:style>
    <ns1:style ns1:name="P4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43" ns1:family="table-cell">
      <ns1:table-cell-properties ns3:border="0.0069in solid #000000" ns1:writing-mode="lr-tb" ns3:padding-top="0in" ns3:padding-left="0.075in" ns3:padding-bottom="0in" ns3:padding-right="0.075in"/>
    </ns1:style>
    <ns1:style ns1:name="P44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45" ns1:family="table-cell">
      <ns1:table-cell-properties ns3:border="0.0069in solid #000000" ns1:writing-mode="lr-tb" ns3:padding-top="0in" ns3:padding-left="0.075in" ns3:padding-bottom="0in" ns3:padding-right="0.075in"/>
    </ns1:style>
    <ns1:style ns1:name="P4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47" ns1:family="table-cell">
      <ns1:table-cell-properties ns3:border="0.0069in solid #000000" ns1:writing-mode="lr-tb" ns3:padding-top="0in" ns3:padding-left="0.075in" ns3:padding-bottom="0in" ns3:padding-right="0.075in"/>
    </ns1:style>
    <ns1:style ns1:name="P4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49" ns1:family="table-row">
      <ns1:table-row-properties ns1:use-optimal-row-height="false"/>
    </ns1:style>
    <ns1:style ns1:name="TableCell50" ns1:family="table-cell">
      <ns1:table-cell-properties ns3:border="0.0069in solid #000000" ns1:writing-mode="lr-tb" ns3:padding-top="0in" ns3:padding-left="0.075in" ns3:padding-bottom="0in" ns3:padding-right="0.075in"/>
    </ns1:style>
    <ns1:style ns1:name="P51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52" ns1:family="table-cell">
      <ns1:table-cell-properties ns3:border="0.0069in solid #000000" ns1:writing-mode="lr-tb" ns3:padding-top="0in" ns3:padding-left="0.075in" ns3:padding-bottom="0in" ns3:padding-right="0.075in"/>
    </ns1:style>
    <ns1:style ns1:name="P5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P54" ns1:parent-style-name="Normal" ns1:family="paragraph">
      <ns1:text-properties ns3:hyphenate="true"/>
    </ns1:style>
    <ns1:style ns1:name="P55" ns1:parent-style-name="Normal" ns1:family="paragraph">
      <ns1:text-properties ns3:hyphenate="true"/>
    </ns1:style>
    <ns1:style ns1:name="TableRow56" ns1:family="table-row">
      <ns1:table-row-properties ns1:use-optimal-row-height="false"/>
    </ns1:style>
    <ns1:style ns1:name="TableCell57" ns1:family="table-cell">
      <ns1:table-cell-properties ns3:border="0.0069in solid #000000" ns1:writing-mode="lr-tb" ns3:padding-top="0in" ns3:padding-left="0.075in" ns3:padding-bottom="0in" ns3:padding-right="0.075in"/>
    </ns1:style>
    <ns1:style ns1:name="P5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59" ns1:family="table-cell">
      <ns1:table-cell-properties ns3:border="0.0069in solid #000000" ns1:writing-mode="lr-tb" ns3:padding-top="0in" ns3:padding-left="0.075in" ns3:padding-bottom="0in" ns3:padding-right="0.075in"/>
    </ns1:style>
    <ns1:style ns1:name="P6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P61" ns1:parent-style-name="Normal" ns1:family="paragraph">
      <ns1:text-properties ns3:hyphenate="true"/>
    </ns1:style>
    <ns1:style ns1:name="P62" ns1:parent-style-name="Normal" ns1:family="paragraph">
      <ns1:text-properties ns3:hyphenate="true"/>
    </ns1:style>
    <ns1:style ns1:name="TableRow63" ns1:family="table-row">
      <ns1:table-row-properties ns1:min-row-height="0.493in" ns1:use-optimal-row-height="false"/>
    </ns1:style>
    <ns1:style ns1:name="TableCell64" ns1:family="table-cell">
      <ns1:table-cell-properties ns3:border="0.0069in solid #000000" ns1:writing-mode="lr-tb" ns3:padding-top="0in" ns3:padding-left="0.075in" ns3:padding-bottom="0in" ns3:padding-right="0.075in"/>
    </ns1:style>
    <ns1:style ns1:name="P6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66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67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68" ns1:family="table-cell">
      <ns1:table-cell-properties ns3:border="0.0069in solid #000000" ns1:writing-mode="lr-tb" ns3:padding-top="0in" ns3:padding-left="0.0069in" ns3:padding-bottom="0in" ns3:padding-right="0.0069in"/>
    </ns1:style>
    <ns1:style ns1:name="P69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70" ns1:family="table-row">
      <ns1:table-row-properties ns1:min-row-height="0.493in" ns1:use-optimal-row-height="false"/>
    </ns1:style>
    <ns1:style ns1:name="TableCell71" ns1:family="table-cell">
      <ns1:table-cell-properties ns3:border="0.0069in solid #000000" ns1:writing-mode="lr-tb" ns3:padding-top="0in" ns3:padding-left="0.075in" ns3:padding-bottom="0in" ns3:padding-right="0.075in"/>
    </ns1:style>
    <ns1:style ns1:name="P72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7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74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75" ns1:family="table-row">
      <ns1:table-row-properties ns1:use-optimal-row-height="false"/>
    </ns1:style>
    <ns1:style ns1:name="TableCell76" ns1:family="table-cell">
      <ns1:table-cell-properties ns3:border="0.0069in solid #000000" ns1:writing-mode="lr-tb" ns3:padding-top="0in" ns3:padding-left="0.075in" ns3:padding-bottom="0in" ns3:padding-right="0.075in"/>
    </ns1:style>
    <ns1:style ns1:name="P77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78" ns1:family="table-cell">
      <ns1:table-cell-properties ns3:border="0.0069in solid #000000" ns1:writing-mode="lr-tb" ns3:padding-top="0in" ns3:padding-left="0.075in" ns3:padding-bottom="0in" ns3:padding-right="0.075in"/>
    </ns1:style>
    <ns1:style ns1:name="P79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80" ns1:family="table-cell">
      <ns1:table-cell-properties ns3:border="0.0069in solid #000000" ns1:writing-mode="lr-tb" ns3:padding-top="0in" ns3:padding-left="0.075in" ns3:padding-bottom="0in" ns3:padding-right="0.075in"/>
    </ns1:style>
    <ns1:style ns1:name="P81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82" ns1:family="table-cell">
      <ns1:table-cell-properties ns3:border="0.0069in solid #000000" ns1:writing-mode="lr-tb" ns3:padding-top="0in" ns3:padding-left="0.075in" ns3:padding-bottom="0in" ns3:padding-right="0.075in"/>
    </ns1:style>
    <ns1:style ns1:name="P8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84" ns1:family="table-cell">
      <ns1:table-cell-properties ns3:border="0.0069in solid #000000" ns1:writing-mode="lr-tb" ns3:padding-top="0in" ns3:padding-left="0.075in" ns3:padding-bottom="0in" ns3:padding-right="0.075in"/>
    </ns1:style>
    <ns1:style ns1:name="P8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86" ns1:family="table-cell">
      <ns1:table-cell-properties ns3:border="0.0069in solid #000000" ns1:writing-mode="lr-tb" ns3:padding-top="0in" ns3:padding-left="0.075in" ns3:padding-bottom="0in" ns3:padding-right="0.075in"/>
    </ns1:style>
    <ns1:style ns1:name="P87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88" ns1:family="table-row">
      <ns1:table-row-properties ns1:use-optimal-row-height="false"/>
    </ns1:style>
    <ns1:style ns1:name="TableCell89" ns1:family="table-cell">
      <ns1:table-cell-properties ns3:border="0.0069in solid #000000" ns1:writing-mode="lr-tb" ns3:padding-top="0in" ns3:padding-left="0.075in" ns3:padding-bottom="0in" ns3:padding-right="0.075in"/>
    </ns1:style>
    <ns1:style ns1:name="P9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1" ns1:family="table-cell">
      <ns1:table-cell-properties ns3:border="0.0069in solid #000000" ns1:writing-mode="lr-tb" ns3:padding-top="0in" ns3:padding-left="0.075in" ns3:padding-bottom="0in" ns3:padding-right="0.075in"/>
    </ns1:style>
    <ns1:style ns1:name="P9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3" ns1:family="table-cell">
      <ns1:table-cell-properties ns3:border="0.0069in solid #000000" ns1:writing-mode="lr-tb" ns3:padding-top="0in" ns3:padding-left="0.075in" ns3:padding-bottom="0in" ns3:padding-right="0.075in"/>
    </ns1:style>
    <ns1:style ns1:name="P94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5" ns1:family="table-cell">
      <ns1:table-cell-properties ns3:border="0.0069in solid #000000" ns1:writing-mode="lr-tb" ns3:padding-top="0in" ns3:padding-left="0.075in" ns3:padding-bottom="0in" ns3:padding-right="0.075in"/>
    </ns1:style>
    <ns1:style ns1:name="P9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7" ns1:family="table-cell">
      <ns1:table-cell-properties ns3:border="0.0069in solid #000000" ns1:writing-mode="lr-tb" ns3:padding-top="0in" ns3:padding-left="0.075in" ns3:padding-bottom="0in" ns3:padding-right="0.075in"/>
    </ns1:style>
    <ns1:style ns1:name="P9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9" ns1:family="table-cell">
      <ns1:table-cell-properties ns3:border="0.0069in solid #000000" ns1:writing-mode="lr-tb" ns3:padding-top="0in" ns3:padding-left="0.075in" ns3:padding-bottom="0in" ns3:padding-right="0.075in"/>
    </ns1:style>
    <ns1:style ns1:name="P10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01" ns1:family="table-row">
      <ns1:table-row-properties ns1:use-optimal-row-height="false"/>
    </ns1:style>
    <ns1:style ns1:name="TableCell102" ns1:family="table-cell">
      <ns1:table-cell-properties ns3:border="0.0069in solid #000000" ns1:writing-mode="lr-tb" ns3:padding-top="0in" ns3:padding-left="0.075in" ns3:padding-bottom="0in" ns3:padding-right="0.075in"/>
    </ns1:style>
    <ns1:style ns1:name="P10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04" ns1:family="table-cell">
      <ns1:table-cell-properties ns3:border="0.0069in solid #000000" ns1:writing-mode="lr-tb" ns3:padding-top="0in" ns3:padding-left="0.075in" ns3:padding-bottom="0in" ns3:padding-right="0.075in"/>
    </ns1:style>
    <ns1:style ns1:name="P105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06" ns1:family="table-cell">
      <ns1:table-cell-properties ns3:border="0.0069in solid #000000" ns1:writing-mode="lr-tb" ns3:padding-top="0in" ns3:padding-left="0.075in" ns3:padding-bottom="0in" ns3:padding-right="0.075in"/>
    </ns1:style>
    <ns1:style ns1:name="P107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08" ns1:family="table-cell">
      <ns1:table-cell-properties ns3:border="0.0069in solid #000000" ns1:writing-mode="lr-tb" ns3:padding-top="0in" ns3:padding-left="0.075in" ns3:padding-bottom="0in" ns3:padding-right="0.075in"/>
    </ns1:style>
    <ns1:style ns1:name="P109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10" ns1:family="table-cell">
      <ns1:table-cell-properties ns3:border="0.0069in solid #000000" ns1:writing-mode="lr-tb" ns3:padding-top="0in" ns3:padding-left="0.075in" ns3:padding-bottom="0in" ns3:padding-right="0.075in"/>
    </ns1:style>
    <ns1:style ns1:name="P111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12" ns1:family="table-cell">
      <ns1:table-cell-properties ns3:border="0.0069in solid #000000" ns1:writing-mode="lr-tb" ns3:padding-top="0in" ns3:padding-left="0.075in" ns3:padding-bottom="0in" ns3:padding-right="0.075in"/>
    </ns1:style>
    <ns1:style ns1:name="P11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14" ns1:family="table-row">
      <ns1:table-row-properties ns1:use-optimal-row-height="false"/>
    </ns1:style>
    <ns1:style ns1:name="TableCell115" ns1:family="table-cell">
      <ns1:table-cell-properties ns3:border="0.0069in solid #000000" ns1:writing-mode="lr-tb" ns3:padding-top="0in" ns3:padding-left="0.075in" ns3:padding-bottom="0in" ns3:padding-right="0.075in"/>
    </ns1:style>
    <ns1:style ns1:name="P11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17" ns1:family="table-cell">
      <ns1:table-cell-properties ns3:border="0.0069in solid #000000" ns1:writing-mode="lr-tb" ns3:padding-top="0in" ns3:padding-left="0.075in" ns3:padding-bottom="0in" ns3:padding-right="0.075in"/>
    </ns1:style>
    <ns1:style ns1:name="P11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19" ns1:family="table-cell">
      <ns1:table-cell-properties ns3:border="0.0069in solid #000000" ns1:writing-mode="lr-tb" ns3:padding-top="0in" ns3:padding-left="0.075in" ns3:padding-bottom="0in" ns3:padding-right="0.075in"/>
    </ns1:style>
    <ns1:style ns1:name="P12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21" ns1:family="table-cell">
      <ns1:table-cell-properties ns3:border="0.0069in solid #000000" ns1:writing-mode="lr-tb" ns3:padding-top="0in" ns3:padding-left="0.075in" ns3:padding-bottom="0in" ns3:padding-right="0.075in"/>
    </ns1:style>
    <ns1:style ns1:name="P12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23" ns1:family="table-cell">
      <ns1:table-cell-properties ns3:border="0.0069in solid #000000" ns1:writing-mode="lr-tb" ns3:padding-top="0in" ns3:padding-left="0.075in" ns3:padding-bottom="0in" ns3:padding-right="0.075in"/>
    </ns1:style>
    <ns1:style ns1:name="P124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25" ns1:family="table-cell">
      <ns1:table-cell-properties ns3:border="0.0069in solid #000000" ns1:writing-mode="lr-tb" ns3:padding-top="0in" ns3:padding-left="0.075in" ns3:padding-bottom="0in" ns3:padding-right="0.075in"/>
    </ns1:style>
    <ns1:style ns1:name="P12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27" ns1:family="table-row">
      <ns1:table-row-properties ns1:use-optimal-row-height="false"/>
    </ns1:style>
    <ns1:style ns1:name="TableCell128" ns1:family="table-cell">
      <ns1:table-cell-properties ns3:border="0.0069in solid #000000" ns1:writing-mode="lr-tb" ns3:padding-top="0in" ns3:padding-left="0.075in" ns3:padding-bottom="0in" ns3:padding-right="0.075in"/>
    </ns1:style>
    <ns1:style ns1:name="P129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0" ns1:family="table-cell">
      <ns1:table-cell-properties ns3:border="0.0069in solid #000000" ns1:writing-mode="lr-tb" ns3:padding-top="0in" ns3:padding-left="0.075in" ns3:padding-bottom="0in" ns3:padding-right="0.075in"/>
    </ns1:style>
    <ns1:style ns1:name="P131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2" ns1:family="table-cell">
      <ns1:table-cell-properties ns3:border="0.0069in solid #000000" ns1:writing-mode="lr-tb" ns3:padding-top="0in" ns3:padding-left="0.075in" ns3:padding-bottom="0in" ns3:padding-right="0.075in"/>
    </ns1:style>
    <ns1:style ns1:name="P13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4" ns1:family="table-cell">
      <ns1:table-cell-properties ns3:border="0.0069in solid #000000" ns1:writing-mode="lr-tb" ns3:padding-top="0in" ns3:padding-left="0.075in" ns3:padding-bottom="0in" ns3:padding-right="0.075in"/>
    </ns1:style>
    <ns1:style ns1:name="P135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6" ns1:family="table-cell">
      <ns1:table-cell-properties ns3:border="0.0069in solid #000000" ns1:writing-mode="lr-tb" ns3:padding-top="0in" ns3:padding-left="0.075in" ns3:padding-bottom="0in" ns3:padding-right="0.075in"/>
    </ns1:style>
    <ns1:style ns1:name="P137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8" ns1:family="table-cell">
      <ns1:table-cell-properties ns3:border="0.0069in solid #000000" ns1:writing-mode="lr-tb" ns3:padding-top="0in" ns3:padding-left="0.075in" ns3:padding-bottom="0in" ns3:padding-right="0.075in"/>
    </ns1:style>
    <ns1:style ns1:name="P139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40" ns1:family="table-row">
      <ns1:table-row-properties ns1:use-optimal-row-height="false"/>
    </ns1:style>
    <ns1:style ns1:name="TableCell141" ns1:family="table-cell">
      <ns1:table-cell-properties ns3:border="0.0069in solid #000000" ns1:writing-mode="lr-tb" ns3:padding-top="0in" ns3:padding-left="0.075in" ns3:padding-bottom="0in" ns3:padding-right="0.075in"/>
    </ns1:style>
    <ns1:style ns1:name="P14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43" ns1:family="table-cell">
      <ns1:table-cell-properties ns3:border="0.0069in solid #000000" ns1:writing-mode="lr-tb" ns3:padding-top="0in" ns3:padding-left="0.075in" ns3:padding-bottom="0in" ns3:padding-right="0.075in"/>
    </ns1:style>
    <ns1:style ns1:name="P144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45" ns1:family="table-cell">
      <ns1:table-cell-properties ns3:border="0.0069in solid #000000" ns1:writing-mode="lr-tb" ns3:padding-top="0in" ns3:padding-left="0.075in" ns3:padding-bottom="0in" ns3:padding-right="0.075in"/>
    </ns1:style>
    <ns1:style ns1:name="P14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47" ns1:family="table-cell">
      <ns1:table-cell-properties ns3:border="0.0069in solid #000000" ns1:writing-mode="lr-tb" ns3:padding-top="0in" ns3:padding-left="0.075in" ns3:padding-bottom="0in" ns3:padding-right="0.075in"/>
    </ns1:style>
    <ns1:style ns1:name="P14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49" ns1:family="table-cell">
      <ns1:table-cell-properties ns3:border="0.0069in solid #000000" ns1:writing-mode="lr-tb" ns3:padding-top="0in" ns3:padding-left="0.075in" ns3:padding-bottom="0in" ns3:padding-right="0.075in"/>
    </ns1:style>
    <ns1:style ns1:name="P15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51" ns1:family="table-cell">
      <ns1:table-cell-properties ns3:border="0.0069in solid #000000" ns1:writing-mode="lr-tb" ns3:padding-top="0in" ns3:padding-left="0.075in" ns3:padding-bottom="0in" ns3:padding-right="0.075in"/>
    </ns1:style>
    <ns1:style ns1:name="P15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53" ns1:family="table-row">
      <ns1:table-row-properties ns1:use-optimal-row-height="false"/>
    </ns1:style>
    <ns1:style ns1:name="TableCell154" ns1:family="table-cell">
      <ns1:table-cell-properties ns3:border="0.0069in solid #000000" ns1:writing-mode="lr-tb" ns3:padding-top="0in" ns3:padding-left="0.075in" ns3:padding-bottom="0in" ns3:padding-right="0.075in"/>
    </ns1:style>
    <ns1:style ns1:name="P155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56" ns1:family="table-cell">
      <ns1:table-cell-properties ns3:border="0.0069in solid #000000" ns1:writing-mode="lr-tb" ns3:padding-top="0in" ns3:padding-left="0.075in" ns3:padding-bottom="0in" ns3:padding-right="0.075in"/>
    </ns1:style>
    <ns1:style ns1:name="P157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58" ns1:family="table-cell">
      <ns1:table-cell-properties ns3:border="0.0069in solid #000000" ns1:writing-mode="lr-tb" ns3:padding-top="0in" ns3:padding-left="0.075in" ns3:padding-bottom="0in" ns3:padding-right="0.075in"/>
    </ns1:style>
    <ns1:style ns1:name="P159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60" ns1:family="table-cell">
      <ns1:table-cell-properties ns3:border="0.0069in solid #000000" ns1:writing-mode="lr-tb" ns3:padding-top="0in" ns3:padding-left="0.075in" ns3:padding-bottom="0in" ns3:padding-right="0.075in"/>
    </ns1:style>
    <ns1:style ns1:name="P161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62" ns1:family="table-cell">
      <ns1:table-cell-properties ns3:border="0.0069in solid #000000" ns1:writing-mode="lr-tb" ns3:padding-top="0in" ns3:padding-left="0.075in" ns3:padding-bottom="0in" ns3:padding-right="0.075in"/>
    </ns1:style>
    <ns1:style ns1:name="P16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64" ns1:family="table-cell">
      <ns1:table-cell-properties ns3:border="0.0069in solid #000000" ns1:writing-mode="lr-tb" ns3:padding-top="0in" ns3:padding-left="0.075in" ns3:padding-bottom="0in" ns3:padding-right="0.075in"/>
    </ns1:style>
    <ns1:style ns1:name="P165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66" ns1:family="table-row">
      <ns1:table-row-properties ns1:use-optimal-row-height="false"/>
    </ns1:style>
    <ns1:style ns1:name="TableCell167" ns1:family="table-cell">
      <ns1:table-cell-properties ns3:border="0.0069in solid #000000" ns1:writing-mode="lr-tb" ns3:padding-top="0in" ns3:padding-left="0.075in" ns3:padding-bottom="0in" ns3:padding-right="0.075in"/>
    </ns1:style>
    <ns1:style ns1:name="P168" ns1:parent-style-name="NormalTextdoc" ns1:family="paragraph">
      <ns1:paragraph-properties ns3:margin-top="0.0791in" ns3:margin-bottom="0.0791in"/>
      <ns1:text-properties ns1:font-name-complex="Arial" ns3:font-weight="bold" ns1:font-weight-asian="bold" ns1:font-weight-complex="bold" ns3:font-size="9pt" ns1:font-size-asian="9pt" ns1:font-size-complex="9pt"/>
    </ns1:style>
    <ns1:style ns1:name="P169" ns1:parent-style-name="NormalTextdoc" ns1:family="paragraph">
      <ns1:paragraph-properties ns3:margin-top="0.0791in" ns3:margin-bottom="0.0791in"/>
      <ns1:text-properties ns1:font-name-complex="Arial" ns3:font-weight="bold" ns1:font-weight-asian="bold" ns1:font-weight-complex="bold" ns3:font-size="9pt" ns1:font-size-asian="9pt" ns1:font-size-complex="9pt"/>
    </ns1:style>
    <ns1:style ns1:name="TableRow170" ns1:family="table-row">
      <ns1:table-row-properties ns1:min-row-height="0.3263in" ns1:use-optimal-row-height="false"/>
    </ns1:style>
    <ns1:style ns1:name="TableCell171" ns1:family="table-cell">
      <ns1:table-cell-properties ns3:border="0.0069in solid #000000" ns1:writing-mode="lr-tb" ns3:padding-top="0in" ns3:padding-left="0.075in" ns3:padding-bottom="0in" ns3:padding-right="0.075in"/>
    </ns1:style>
    <ns1:style ns1:name="P172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17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174" ns1:family="table-row">
      <ns1:table-row-properties ns1:min-row-height="0.3263in" ns1:use-optimal-row-height="false"/>
    </ns1:style>
    <ns1:style ns1:name="TableCell175" ns1:family="table-cell">
      <ns1:table-cell-properties ns3:border="0.0069in solid #000000" ns1:writing-mode="lr-tb" ns3:padding-top="0in" ns3:padding-left="0.075in" ns3:padding-bottom="0in" ns3:padding-right="0.075in"/>
    </ns1:style>
    <ns1:style ns1:name="P176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177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</office:automatic-styles>
  <office:body>
    <office:text text:use-soft-page-breaks="true">
      <text:p text:style-name="P1">ACTIVITAT D’ENSENYAMENT-APRENENTATGE</text:p>
      <text:p text:style-name="NormalTextdoc"/>
      <text:p text:style-name="NormalTextdoc"/>
      <table:table table:style-name="Table3">
        <table:table-columns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</table:table-columns>
        <table:table-row table:style-name="TableRow11">
          <table:table-cell table:style-name="TableCell12" table:number-columns-spanned="5">
            <text:p text:style-name="P13">Mòdul professional: 0485 Programació</text:p>
          </table:table-cell>
          <table:covered-table-cell/>
          <table:covered-table-cell/>
          <table:covered-table-cell/>
          <table:covered-table-cell/>
          <table:table-cell table:style-name="TableCell14" table:number-columns-spanned="2">
            <text:p text:style-name="P15">Codi activitat: PROG_RA1_ACT1</text:p>
          </table:table-cell>
          <table:covered-table-cell/>
        </table:table-row>
        <table:table-row table:style-name="TableRow16">
          <table:table-cell table:style-name="TableCell17" table:number-columns-spanned="5">
            <text:p text:style-name="P18">Nom de l'activitat: Moviment bàsic del personatge en Unity</text:p>
          </table:table-cell>
          <table:covered-table-cell/>
          <table:covered-table-cell/>
          <table:covered-table-cell/>
          <table:covered-table-cell/>
          <table:table-cell table:style-name="TableCell19" table:number-columns-spanned="2">
            <text:p text:style-name="P20">Durada: 6 hores (2 sessions de 3 h)</text:p>
          </table:table-cell>
          <table:covered-table-cell/>
        </table:table-row>
        <table:table-row table:style-name="TableRow23">
          <table:table-cell table:style-name="TableCell24" table:number-columns-spanned="7">
            <text:p text:style-name="P25">Descripció: L'alumnat implementa un script en C# per al moviment del personatge al pla XZ dins del projecte base de Unity. L'activitat integra lectura d'entrada, variables de velocitat i validació del funcionament en mode Play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6">
          <table:table-cell table:style-name="TableCell27" table:number-columns-spanned="7">
            <text:p text:style-name="P28">Objectius ODS vinculats: ODS 4 (Educació de qualitat), ODS 8 (Treball digne i creixement econòmic), ODS 9 (Indústria, innovació i infraestructura)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31">
          <table:table-cell table:style-name="TableCell32">
            <text:p text:style-name="P33">Resultats d’aprenentatge</text:p>
          </table:table-cell>
          <table:table-cell table:style-name="TableCell34" table:number-columns-spanned="3">
            <text:p text:style-name="P35">Criteris d’avaluació</text:p>
          </table:table-cell>
          <table:covered-table-cell/>
          <table:covered-table-cell/>
          <table:table-cell table:style-name="TableCell36">
            <text:p text:style-name="P37">Continguts</text:p>
          </table:table-cell>
          <table:table-cell table:style-name="TableCell38" table:number-columns-spanned="2">
            <text:p text:style-name="P39">Capacitats clau</text:p>
          </table:table-cell>
          <table:covered-table-cell/>
        </table:table-row>
        <table:table-row table:style-name="TableRow40">
          <table:table-cell table:style-name="TableCell41">
            <text:p text:style-name="P42">RA1: Reconeix l'estructura d'un programa informàtic, identificant i relacionant els elements propis del llenguatge de programació utilitzat.</text:p>
          </table:table-cell>
          <table:table-cell table:style-name="TableCell43" table:number-columns-spanned="3">
            <text:p text:style-name="P44">- Identifica els blocs que componen l'estructura d'un programa informàtic.</text:p>
            <text:p text:style-name="P44">- Crea projectes de desenvolupament d'aplicacions.</text:p>
            <text:p text:style-name="P44">- Utilitza entorns integrats de desenvolupament.</text:p>
            <text:p text:style-name="P44">- Identifica els diferents tipus de variables i la utilitat específica de cadascun.</text:p>
            <text:p text:style-name="P44">- Modifica el codi d'un programa per crear i fer servir variables.</text:p>
            <text:p text:style-name="P44">- Crea i utilitza constants i literals.</text:p>
            <text:p text:style-name="P44">- Classifica i utilitza operadors del llenguatge en expressions.</text:p>
            <text:p text:style-name="P44">- Comprova conversions de tipus explícites i implícites.</text:p>
            <text:p text:style-name="P44">- Introdueix comentaris al codi.</text:p>
          </table:table-cell>
          <table:covered-table-cell/>
          <table:covered-table-cell/>
          <table:table-cell table:style-name="TableCell45" table:number-rows-spanned="3">
            <text:p text:style-name="P46">- Estructura i blocs fonamentals d'un script C# a Unity.</text:p>
            <text:p text:style-name="P46">- Variables, constants, literals, operadors i expressions.</text:p>
            <text:p text:style-name="P46">- Conversió de tipus i comentaris en codi.</text:p>
            <text:p text:style-name="P46">- Ús de l'IDE (Visual Studio o Rider) integrat amb Unity.</text:p>
          </table:table-cell>
          <table:table-cell table:style-name="TableCell47" table:number-columns-spanned="2" table:number-rows-spanned="3">
            <text:p text:style-name="P48">- Competència digital.</text:p>
            <text:p text:style-name="P48">- Resolució de problemes.</text:p>
            <text:p text:style-name="P48">- Treball en equip.</text:p>
            <text:p text:style-name="P48">- Aprenentatge autònom.</text:p>
            <text:p text:style-name="P48">- Pensament crític.</text:p>
          </table:table-cell>
          <table:covered-table-cell/>
        </table:table-row>
        <table:table-row table:style-name="TableRow49">
          <table:table-cell table:style-name="TableCell50">
            <text:p text:style-name="P51"/>
          </table:table-cell>
          <table:table-cell table:style-name="TableCell52" table:number-columns-spanned="3">
            <text:p text:style-name="P53"/>
          </table:table-cell>
          <table:covered-table-cell/>
          <table:covered-table-cell/>
          <table:covered-table-cell>
            <text:p text:style-name="P54"/>
          </table:covered-table-cell>
          <table:covered-table-cell>
            <text:p text:style-name="P55"/>
          </table:covered-table-cell>
          <table:covered-table-cell/>
        </table:table-row>
        <table:table-row table:style-name="TableRow56">
          <table:table-cell table:style-name="TableCell57">
            <text:p text:style-name="P58"/>
          </table:table-cell>
          <table:table-cell table:style-name="TableCell59" table:number-columns-spanned="3">
            <text:p text:style-name="P60"/>
          </table:table-cell>
          <table:covered-table-cell/>
          <table:covered-table-cell/>
          <table:covered-table-cell>
            <text:p text:style-name="P61"/>
          </table:covered-table-cell>
          <table:covered-table-cell>
            <text:p text:style-name="P62"/>
          </table:covered-table-cell>
          <table:covered-table-cell/>
        </table:table-row>
        <table:table-row table:style-name="TableRow63">
          <table:table-cell table:style-name="TableCell64" table:number-columns-spanned="3">
            <text:p text:style-name="P65">Competències professionals, personals i socials del cicle: desenvolupar components de programari funcionals i mantenibles; resoldre incidències tècniques; col·laborar en equips de treball; comunicar i documentar solucions tècniques.</text:p>
          </table:table-cell>
          <table:covered-table-cell/>
          <table:covered-table-cell/>
          <table:table-cell table:style-name="TableCell68" table:number-columns-spanned="4">
            <text:p text:style-name="P69">Objectius del cicle: aplicar fonaments de programació orientada a objectes, crear aplicacions funcionals, verificar i depurar codi, i integrar bones pràctiques de qualitat en el desenvolupament.</text:p>
          </table:table-cell>
          <table:covered-table-cell/>
          <table:covered-table-cell/>
          <table:covered-table-cell/>
        </table:table-row>
        <table:table-row table:style-name="TableRow70">
          <table:table-cell table:style-name="TableCell71" table:number-columns-spanned="7">
            <text:p text:style-name="P72">Organitzadors previs: coneixements bàsics de sintaxi C#, ús bàsic de Unity Editor, compilació de scripts i ús elemental de variables i operadors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75">
          <table:table-cell table:style-name="TableCell76">
            <text:p text:style-name="P77">Seqüència de l’activitat d’ensenyament-aprenentatge</text:p>
          </table:table-cell>
          <table:table-cell table:style-name="TableCell78">
            <text:p text:style-name="P79">Organització aula</text:p>
          </table:table-cell>
          <table:table-cell table:style-name="TableCell80" table:number-columns-spanned="2">
            <text:p text:style-name="P81">Temporització</text:p>
          </table:table-cell>
          <table:covered-table-cell/>
          <table:table-cell table:style-name="TableCell82">
            <text:p text:style-name="P83">Metodologia</text:p>
          </table:table-cell>
          <table:table-cell table:style-name="TableCell84">
            <text:p text:style-name="P85">Recursos</text:p>
          </table:table-cell>
          <table:table-cell table:style-name="TableCell86">
            <text:p text:style-name="P87">Localització</text:p>
          </table:table-cell>
        </table:table-row>
        <table:table-row table:style-name="TableRow88">
          <table:table-cell table:style-name="TableCell89">
            <text:p text:style-name="P90">Presentació del repte i anàlisi del codi plantilla.</text:p>
          </table:table-cell>
          <table:table-cell table:style-name="TableCell91">
            <text:p text:style-name="P92">Gran grup + parelles</text:p>
          </table:table-cell>
          <table:table-cell table:style-name="TableCell93" table:number-columns-spanned="2">
            <text:p text:style-name="P94">30 min</text:p>
          </table:table-cell>
          <table:covered-table-cell/>
          <table:table-cell table:style-name="TableCell95">
            <text:p text:style-name="P96">Activació de coneixements previs</text:p>
          </table:table-cell>
          <table:table-cell table:style-name="TableCell97">
            <text:p text:style-name="P98">Projector, enunciat, Unity</text:p>
          </table:table-cell>
          <table:table-cell table:style-name="TableCell99">
            <text:p text:style-name="P100">Aula taller</text:p>
          </table:table-cell>
        </table:table-row>
        <table:table-row table:style-name="TableRow101">
          <table:table-cell table:style-name="TableCell102">
            <text:p text:style-name="P103">Configuració del projecte i edició de l'script de moviment.</text:p>
          </table:table-cell>
          <table:table-cell table:style-name="TableCell104">
            <text:p text:style-name="P105">Treball individual guiat</text:p>
          </table:table-cell>
          <table:table-cell table:style-name="TableCell106" table:number-columns-spanned="2">
            <text:p text:style-name="P107">60 min</text:p>
          </table:table-cell>
          <table:covered-table-cell/>
          <table:table-cell table:style-name="TableCell108">
            <text:p text:style-name="P109">Demostració + pràctica guiada</text:p>
          </table:table-cell>
          <table:table-cell table:style-name="TableCell110">
            <text:p text:style-name="P111">PC, Unity, IDE</text:p>
          </table:table-cell>
          <table:table-cell table:style-name="TableCell112">
            <text:p text:style-name="P113">Aula informàtica</text:p>
          </table:table-cell>
        </table:table-row>
        <table:table-row table:style-name="TableRow114">
          <table:table-cell table:style-name="TableCell115">
            <text:p text:style-name="P116">Implementació de lectura d'entrada i desplaçament al pla XZ.</text:p>
          </table:table-cell>
          <table:table-cell table:style-name="TableCell117">
            <text:p text:style-name="P118">Individual</text:p>
          </table:table-cell>
          <table:table-cell table:style-name="TableCell119" table:number-columns-spanned="2">
            <text:p text:style-name="P120">60 min</text:p>
          </table:table-cell>
          <table:covered-table-cell/>
          <table:table-cell table:style-name="TableCell121">
            <text:p text:style-name="P122">Aprenentatge basat en tasques</text:p>
          </table:table-cell>
          <table:table-cell table:style-name="TableCell123">
            <text:p text:style-name="P124">TransversalPlayerMovementTemplate.cs</text:p>
          </table:table-cell>
          <table:table-cell table:style-name="TableCell125">
            <text:p text:style-name="P126">Aula informàtica</text:p>
          </table:table-cell>
        </table:table-row>
        <table:table-row table:style-name="TableRow127">
          <table:table-cell table:style-name="TableCell128">
            <text:p text:style-name="P129">Proves, depuració i ajust de velocitat.</text:p>
          </table:table-cell>
          <table:table-cell table:style-name="TableCell130">
            <text:p text:style-name="P131">Individual amb suport docent</text:p>
          </table:table-cell>
          <table:table-cell table:style-name="TableCell132" table:number-columns-spanned="2">
            <text:p text:style-name="P133">45 min</text:p>
          </table:table-cell>
          <table:covered-table-cell/>
          <table:table-cell table:style-name="TableCell134">
            <text:p text:style-name="P135">Pràctica iterativa amb feedback</text:p>
          </table:table-cell>
          <table:table-cell table:style-name="TableCell136">
            <text:p text:style-name="P137">Mode Play, consola Unity</text:p>
          </table:table-cell>
          <table:table-cell table:style-name="TableCell138">
            <text:p text:style-name="P139">Aula informàtica</text:p>
          </table:table-cell>
        </table:table-row>
        <table:table-row table:style-name="TableRow140">
          <table:table-cell table:style-name="TableCell141">
            <text:p text:style-name="P142">Revisió entre iguals i millores finals del codi.</text:p>
          </table:table-cell>
          <table:table-cell table:style-name="TableCell143">
            <text:p text:style-name="P144">Parelles</text:p>
          </table:table-cell>
          <table:table-cell table:style-name="TableCell145" table:number-columns-spanned="2">
            <text:p text:style-name="P146">30 min</text:p>
          </table:table-cell>
          <table:covered-table-cell/>
          <table:table-cell table:style-name="TableCell147">
            <text:p text:style-name="P148">Coavaluació</text:p>
          </table:table-cell>
          <table:table-cell table:style-name="TableCell149">
            <text:p text:style-name="P150">Rúbrica curta de revisió</text:p>
          </table:table-cell>
          <table:table-cell table:style-name="TableCell151">
            <text:p text:style-name="P152">Aula informàtica</text:p>
          </table:table-cell>
        </table:table-row>
        <table:table-row table:style-name="TableRow153">
          <table:table-cell table:style-name="TableCell154">
            <text:p text:style-name="P155">Lliurament i autoavaluació breu.</text:p>
          </table:table-cell>
          <table:table-cell table:style-name="TableCell156">
            <text:p text:style-name="P157">Individual + gran grup</text:p>
          </table:table-cell>
          <table:table-cell table:style-name="TableCell158" table:number-columns-spanned="2">
            <text:p text:style-name="P159">15 min</text:p>
          </table:table-cell>
          <table:covered-table-cell/>
          <table:table-cell table:style-name="TableCell160">
            <text:p text:style-name="P161">Metacognició</text:p>
          </table:table-cell>
          <table:table-cell table:style-name="TableCell162">
            <text:p text:style-name="P163">Formulari i checklist</text:p>
          </table:table-cell>
          <table:table-cell table:style-name="TableCell164">
            <text:p text:style-name="P165">Aula taller</text:p>
          </table:table-cell>
        </table:table-row>
        <table:table-row table:style-name="TableRow166">
          <table:table-cell table:style-name="TableCell167" table:number-columns-spanned="7">
            <text:p text:style-name="P168">Documentació:</text:p>
            <text:p text:style-name="P168">- Enunciat: Assets/TransversalTool/Documentation/Statements/Programming_RA1.md</text:p>
            <text:p text:style-name="P168">- Plantilla alumne: Assets/TransversalTool/Templates/Student/Programming/TransversalPlayerMovementTemplate.cs</text:p>
            <text:p text:style-name="P168">- Solució professorat: Assets/TransversalTool/Templates/Teacher/Programming/TransversalPlayerMovementSolution.cs</text:p>
            <text:p text:style-name="P168">- Guia Unity: https://www.notion.so/Unity-30f6d409c061809b99a5f3eac550d797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70">
          <table:table-cell table:style-name="TableCell171" table:number-columns-spanned="7">
            <text:p text:style-name="P172">Instruments d'avaluació:</text:p>
            <text:p text:style-name="P172">- Rúbrica de codi (estructura, variables, operadors, comentaris).</text:p>
            <text:p text:style-name="P172">- Llista de verificació de funcionament en mode Play.</text:p>
            <text:p text:style-name="P172">- Observació directa del procés de resolució i depuració.</text:p>
            <text:p text:style-name="P172">- Autoavaluació breu de l'alumnat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74">
          <table:table-cell table:style-name="TableCell175" table:number-columns-spanned="7">
            <text:p text:style-name="P176">Mesures flexibilitzadores:</text:p>
            <text:p text:style-name="P176">- Plantilla amb codi parcial i comentaris guia.</text:p>
            <text:p text:style-name="P176">- Suport visual pas a pas per a alumnat amb dificultats inicials.</text:p>
            <text:p text:style-name="P176">- Treball cooperatiu en parelles amb rols definits.</text:p>
            <text:p text:style-name="P176">- Ampliació opcional: moviment diagonal suavitzat i límit de velocitat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NormalTextdoc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 svg:panose-1="2 2 6 3 5 4 5 2 3 4"/>
    <style:font-face style:name="DejaVu Sans" svg:font-family="DejaVu Sans" style:font-family-generic="swiss" style:font-pitch="variable" svg:panose-1="2 11 6 3 3 8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Arial" svg:font-family="Arial" style:font-family-generic="swiss" style:font-pitch="variable" svg:panose-1="2 11 6 4 2 2 2 2 2 4"/>
    <style:font-face style:name="Times" svg:font-family="Times" style:font-family-generic="roman" style:font-pitch="variable" svg:panose-1="2 2 6 3 5 4 5 2 3 4"/>
    <style:font-face style:name="OpenSymbol" svg:font-family="OpenSymbol" style:font-family-generic="system" style:font-pitch="variable" svg:panose-1="5 1 0 0 0 0 0 0 0 0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16in">
        <style:background-fill draw:fill="solid"/>
      </style:paragraph-properties>
      <style:text-properties style:font-name="Liberation Serif" style:font-name-asian="DejaVu Sans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ca" fo:country="ES" style:language-asian="es" style:country-asian="E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Lletraperdefectedelparàgraf" style:display-name="Lletra per defecte del paràgraf" style:family="text"/>
    <style:style style:name="Título1" style:display-name="Título 1" style:family="paragraph" style:parent-style-name="Heading" style:next-style-name="Textbody" style:default-outline-level="1">
      <style:paragraph-properties fo:margin-top="0.1666in" fo:margin-bottom="0.0833in"/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 fo:margin-bottom="0.0833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 fo:margin-bottom="0.0833in"/>
      <style:text-properties fo:font-weight="bold" style:font-weight-asian="bold" style:font-weight-complex="bold" fo:hyphenate="false"/>
    </style:style>
    <style:style style:name="Título4" style:display-name="Título 4" style:family="paragraph" style:parent-style-name="Heading" style:next-style-name="Textbody" style:default-outline-level="4">
      <style:text-properties fo:font-weight="bold" style:font-weight-asian="bold" style:font-weight-complex="bold" fo:font-style="italic" style:font-style-asian="italic" style:font-style-complex="italic"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widows="2" fo:orphans="2"/>
      <style:text-properties style:font-name="Liberation Sans" style:font-name-asian="Liberation Sans" style:font-name-complex="Liberation Sans" fo:font-size="11pt" style:font-size-asian="11pt" fo:hyphenate="false"/>
    </style:style>
    <style:style style:name="Heading" style:display-name="Heading" style:family="paragraph" style:parent-style-name="Standard">
      <style:paragraph-properties text:number-lines="false">
        <style:tab-stops>
          <style:tab-stop style:type="center" style:position="3.3458in"/>
          <style:tab-stop style:type="right" style:position="6.6923in"/>
        </style:tab-stops>
      </style:paragraph-properties>
      <style:text-properties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font-size="12pt" style:font-size-asian="12pt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Footnote" style:display-name="Footnote" style:family="paragraph" style:parent-style-name="Standard">
      <style:paragraph-properties text:number-lines="false">
        <style:tab-stops>
          <style:tab-stop style:type="center" style:position="3.7402in"/>
          <style:tab-stop style:type="right" style:position="7.4805in"/>
        </style:tab-stops>
      </style:paragraph-properties>
      <style:text-properties fo:hyphenate="false"/>
    </style:style>
    <style:style style:name="PLOEPortadaCapçalera1" style:display-name="[PLOE] Portada Capçalera 1" style:family="paragraph" style:parent-style-name="Standard" style:next-style-name="PLOEPortadaCapçalera2">
      <style:paragraph-properties fo:border="0.0034in solid #666666" fo:padding="0.0138in" style:shadow="none" fo:margin-bottom="0.0194in" fo:text-indent="1.3777in" fo:background-color="#666666">
        <style:background-fill draw:fill="solid" draw:fill-color="#666666"/>
      </style:paragraph-properties>
      <style:text-properties fo:font-weight="bold" style:font-weight-asian="bold" fo:color="#FFFFFF" fo:font-size="13pt" style:font-size-asian="13pt" fo:hyphenate="false"/>
    </style:style>
    <style:style style:name="PLOEPortadaCapçalera2" style:display-name="[PLOE] Portada Capçalera 2" style:family="paragraph" style:parent-style-name="PLOEPortadaCapçalera1" style:next-style-name="PLOEPortadaCapçalera3">
      <style:paragraph-properties fo:border="0.0034in solid #E6E6E6" fo:padding="0.0416in" style:shadow="none" fo:background-color="#E6E6E6">
        <style:tab-stops>
          <style:tab-stop style:type="left" style:position="2.0666in"/>
        </style:tab-stops>
        <style:background-fill draw:fill="solid" draw:fill-color="#E6E6E6"/>
      </style:paragraph-properties>
      <style:text-properties fo:font-weight="normal" style:font-weight-asian="normal" fo:color="#808080" fo:font-size="11pt" style:font-size-asian="11pt" fo:hyphenate="false"/>
    </style:style>
    <style:style style:name="PLOEPortadaCapçalera3" style:display-name="[PLOE] Portada Capçalera 3" style:family="paragraph" style:parent-style-name="PLOEPortadaCapçalera2" style:next-style-name="PLOEPortadaCapçalera4">
      <style:paragraph-properties fo:border="0.0034in solid #FFFFFF" fo:padding="0.0416in" style:shadow="none"/>
      <style:text-properties fo:hyphenate="false"/>
    </style:style>
    <style:style style:name="PLOEPortadaCapçalera4" style:display-name="[PLOE] Portada Capçalera 4" style:family="paragraph" style:parent-style-name="PLOEPortadaCapçalera3">
      <style:text-properties fo:font-weight="bold" style:font-weight-asian="bold" fo:font-size="10.5pt" style:font-size-asian="10.5pt" fo:hyphenate="false"/>
    </style:style>
    <style:style style:name="PLOEPortadaTítol1" style:display-name="[PLOE] Portada Títol 1" style:family="paragraph" style:parent-style-name="Standard" style:next-style-name="PLOEPortadaTítol1Continuació">
      <style:paragraph-properties fo:margin-top="1.1812in" fo:margin-left="2.3625in">
        <style:tab-stops/>
      </style:paragraph-properties>
      <style:text-properties fo:font-weight="bold" style:font-weight-asian="bold" fo:color="#808080" fo:font-size="28pt" style:font-size-asian="28pt" fo:hyphenate="false"/>
    </style:style>
    <style:style style:name="PLOEPortadaTítol1Continuació" style:display-name="[PLOE] Portada Títol 1 Continuació" style:family="paragraph" style:parent-style-name="PLOEPortadaTítol1">
      <style:paragraph-properties fo:margin-top="0.0784in"/>
      <style:text-properties fo:hyphenate="false"/>
    </style:style>
    <style:style style:name="PLOEPortadaTítol2" style:display-name="[PLOE] Portada Títol 2" style:family="paragraph" style:parent-style-name="PLOEPortadaTítol1" style:next-style-name="PLOEPortadaTítol2Continuació">
      <style:paragraph-properties fo:margin-top="0.5902in"/>
      <style:text-properties fo:color="#B3B3B3" fo:font-size="24pt" style:font-size-asian="24pt" fo:hyphenate="false"/>
    </style:style>
    <style:style style:name="PLOEPortadaTítol2Continuació" style:display-name="[PLOE] Portada Títol 2 Continuació" style:family="paragraph" style:parent-style-name="PLOEPortadaTítol2">
      <style:paragraph-properties fo:margin-top="0.0784in"/>
      <style:text-properties fo:hyphenate="false"/>
    </style:style>
    <style:style style:name="PLOEPeudepàgina1" style:display-name="[PLOE] Peu de pàgina 1" style:family="paragraph" style:parent-style-name="Footnote" style:next-style-name="PLOEPeudepàgina2">
      <style:paragraph-properties fo:border="0.0034in solid #000000" fo:padding="0.0138in" style:shadow="none" fo:margin-left="0.4923in">
        <style:tab-stops>
          <style:tab-stop style:type="center" style:position="3.2479in"/>
          <style:tab-stop style:type="right" style:position="6.9881in"/>
        </style:tab-stops>
      </style:paragraph-properties>
      <style:text-properties fo:font-size="10.5pt" style:font-size-asian="10.5pt" fo:hyphenate="false"/>
    </style:style>
    <style:style style:name="PLOEPeudepàgina2" style:display-name="[PLOE] Peu de pàgina 2" style:family="paragraph" style:parent-style-name="PLOEPeudepàgina1">
      <style:paragraph-properties fo:border="none" fo:padding="0in" style:shadow="none" fo:margin-top="0.0395in" fo:background-color="#C0C0C0">
        <style:background-fill draw:fill="solid" draw:fill-color="#C0C0C0"/>
      </style:paragraph-properties>
      <style:text-properties fo:font-weight="bold" style:font-weight-asian="bold" fo:hyphenate="false"/>
    </style:style>
    <style:style style:name="PLOECapçalera" style:display-name="[PLOE] Capçalera" style:family="paragraph" style:parent-style-name="Standard">
      <style:paragraph-properties fo:margin-top="0.0784in">
        <style:tab-stops>
          <style:tab-stop style:type="left" style:position="2.1652in"/>
        </style:tab-stops>
      </style:paragraph-properties>
      <style:text-properties fo:color="#808080" fo:hyphenate="false"/>
    </style:style>
    <style:style style:name="Títulodeíndice" style:display-name="Título de índice" style:family="paragraph" style:parent-style-name="Heading">
      <style:text-properties fo:font-weight="bold" style:font-weight-asian="bold" style:font-weight-complex="bold" fo:font-size="16pt" style:font-size-asian="16pt" style:font-size-complex="16pt" fo:hyphenate="false"/>
    </style:style>
    <style:style style:name="ContentsHeading" style:display-name="Contents Heading" style:family="paragraph" style:parent-style-name="Heading">
      <style:text-properties fo:font-weight="bold" style:font-weight-asian="bold" style:font-weight-complex="bold" fo:font-size="16pt" style:font-size-asian="16pt" style:font-size-complex="16pt" fo:hyphenate="false"/>
    </style:style>
    <style:style style:name="PLOEEncapçalament1" style:display-name="[PLOE] Encapçalament 1" style:family="paragraph" style:parent-style-name="Standard" style:next-style-name="PLOECosdelText" style:default-outline-level="1">
      <style:paragraph-properties fo:break-before="page" fo:margin-bottom="0.1965in" fo:background-color="#E6E6E6">
        <style:background-fill draw:fill="solid" draw:fill-color="#E6E6E6"/>
      </style:paragraph-properties>
      <style:text-properties fo:font-weight="bold" style:font-weight-asian="bold" fo:font-size="12pt" style:font-size-asian="12pt"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6937in"/>
        </style:tab-stops>
      </style:paragraph-properties>
      <style:text-properties fo:hyphenate="false"/>
    </style:style>
    <style:style style:name="PLOEÍndex1" style:display-name="[PLOE] Índex 1" style:family="paragraph" style:parent-style-name="Contents1">
      <style:paragraph-properties fo:margin-bottom="0.0395in"/>
      <style:text-properties fo:font-weight="bold" style:font-weight-asian="bold" fo:font-size="10pt" style:font-size-asian="10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PLOETaulaCanvisEncapçalament1" style:display-name="[PLOE] Taula Canvis Encapçalament 1" style:family="paragraph" style:parent-style-name="TableContents">
      <style:paragraph-properties fo:text-align="center"/>
      <style:text-properties fo:font-size="14pt" style:font-size-asian="14pt" fo:hyphenate="false"/>
    </style:style>
    <style:style style:name="PLOETaulaCanvisEncapçalament2" style:display-name="[PLOE] Taula Canvis Encapçalament 2" style:family="paragraph" style:parent-style-name="TableContents">
      <style:paragraph-properties fo:text-align="center" style:vertical-align="middle"/>
      <style:text-properties fo:font-weight="bold" style:font-weight-asian="bold" fo:font-size="10.5pt" style:font-size-asian="10.5pt"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PLOETaulaCanvis" style:display-name="[PLOE] Taula Canvis" style:family="paragraph" style:parent-style-name="PLOETaulaCanvisEncapçalament2">
      <style:paragraph-properties fo:text-align="start"/>
      <style:text-properties fo:font-weight="normal" style:font-weight-asian="normal" fo:hyphenate="false"/>
    </style:style>
    <style:style style:name="PLOETaulaCanvisCentrat" style:display-name="[PLOE] Taula Canvis Centrat" style:family="paragraph" style:parent-style-name="PLOETaulaCanvis">
      <style:paragraph-properties fo:text-align="center"/>
      <style:text-properties fo:hyphenate="false"/>
    </style:style>
    <style:style style:name="PLOECosdelText" style:display-name="[PLOE] Cos del Text" style:family="paragraph" style:parent-style-name="Textbody">
      <style:paragraph-properties fo:text-align="justify"/>
      <style:text-properties fo:hyphenate="false"/>
    </style:style>
    <style:style style:name="PLOETaulaCanvisPeu" style:display-name="[PLOE] Taula Canvis Peu" style:family="paragraph" style:parent-style-name="PLOETaulaCanvis">
      <style:text-properties fo:hyphenate="false"/>
    </style:style>
    <style:style style:name="PLOECosdelTextÈmfasi" style:display-name="[PLOE] Cos del Text Èmfasi" style:family="paragraph" style:parent-style-name="PLOECosdelText" style:next-style-name="PLOECosdelText">
      <style:text-properties fo:font-weight="bold" style:font-weight-asian="bold" fo:font-size="10.5pt" style:font-size-asian="10.5pt" fo:hyphenate="false"/>
    </style:style>
    <style:style style:name="PLOETaulaDistribucióHoresEncapçalament1" style:display-name="[PLOE] Taula Distribució Hores Encapçalament 1" style:family="paragraph" style:parent-style-name="TableContents">
      <style:paragraph-properties fo:text-align="center" fo:margin-top="0.0159in" fo:margin-bottom="0.0159in"/>
      <style:text-properties fo:font-size="10.5pt" style:font-size-asian="10.5pt" fo:hyphenate="false"/>
    </style:style>
    <style:style style:name="PLOETaulaDistribucióHoresEncapçalament2" style:display-name="[PLOE] Taula Distribució Hores Encapçalament 2" style:family="paragraph" style:parent-style-name="PLOETaulaDistribucióHoresEncapçalament1">
      <style:text-properties fo:hyphenate="false"/>
    </style:style>
    <style:style style:name="PLOETaulaDistribucióHores" style:display-name="[PLOE] Taula Distribució Hores" style:family="paragraph" style:parent-style-name="PLOETaulaDistribucióHoresEncapçalament2">
      <style:text-properties fo:hyphenate="false"/>
    </style:style>
    <style:style style:name="PLOETaulaTrimestre" style:display-name="[PLOE] Taula Trimestre" style:family="paragraph" style:parent-style-name="TableContents">
      <style:text-properties fo:font-size="10.5pt" style:font-size-asian="10.5pt" fo:hyphenate="false"/>
    </style:style>
    <style:style style:name="PLOETaulaTrimestreEncapçalament1" style:display-name="[PLOE] Taula Trimestre Encapçalament 1" style:family="paragraph" style:parent-style-name="PLOETaulaTrimestre">
      <style:text-properties fo:font-weight="bold" style:font-weight-asian="bold" fo:font-size="12pt" style:font-size-asian="12pt" fo:hyphenate="false"/>
    </style:style>
    <style:style style:name="PLOETaulaTrimestreCentrat" style:display-name="[PLOE] Taula Trimestre Centrat" style:family="paragraph" style:parent-style-name="PLOETaulaTrimestre">
      <style:paragraph-properties fo:text-align="center"/>
      <style:text-properties fo:hyphenate="false"/>
    </style:style>
    <style:style style:name="PLOETaulaTrimestreEncapçalament2" style:display-name="[PLOE] Taula Trimestre Encapçalament 2" style:family="paragraph" style:parent-style-name="PLOETaulaTrimestreEncapçalament1">
      <style:text-properties fo:font-size="11pt" style:font-size-asian="11pt" fo:hyphenate="false"/>
    </style:style>
    <style:style style:name="PLOETaulaTrimestreEncapçalament2Centrat" style:display-name="[PLOE] Taula Trimestre Encapçalament 2 Centrat" style:family="paragraph" style:parent-style-name="PLOETaulaTrimestreEncapçalament2">
      <style:paragraph-properties fo:text-align="center"/>
      <style:text-properties fo:hyphenate="false"/>
    </style:style>
    <style:style style:name="PLOETaulaTrimestreEncapçalament3" style:display-name="[PLOE] Taula Trimestre Encapçalament 3" style:family="paragraph" style:parent-style-name="PLOETaulaTrimestreEncapçalament2Centrat">
      <style:paragraph-properties fo:text-align="start"/>
      <style:text-properties fo:font-weight="normal" style:font-weight-asian="normal" fo:font-size="10.5pt" style:font-size-asian="10.5pt" fo:hyphenate="false"/>
    </style:style>
    <style:style style:name="PLOETaulaTrimestreEncapçalament4" style:display-name="[PLOE] Taula Trimestre Encapçalament 4" style:family="paragraph" style:parent-style-name="PLOETaulaTrimestreEncapçalament3">
      <style:paragraph-properties fo:text-align="center"/>
      <style:text-properties fo:letter-spacing="0.0694in" fo:hyphenate="false"/>
    </style:style>
    <style:style style:name="PLOETaulaTrimestreEncapçalament5" style:display-name="[PLOE] Taula Trimestre Encapçalament 5" style:family="paragraph" style:parent-style-name="PLOETaulaTrimestreEncapçalament4">
      <style:text-properties fo:letter-spacing="normal" fo:hyphenate="false"/>
    </style:style>
    <style:style style:name="PLOEEncapçalament2" style:display-name="[PLOE] Encapçalament 2" style:family="paragraph" style:parent-style-name="PLOEEncapçalament1" style:next-style-name="PLOECosdelText" style:default-outline-level="2">
      <style:paragraph-properties fo:keep-with-next="always" fo:break-before="auto" fo:margin-top="0.1965in" fo:margin-bottom="0in"/>
      <style:text-properties fo:font-size="11pt" style:font-size-asian="11pt" fo:hyphenate="false"/>
    </style:style>
    <style:style style:name="PLOETaulaBàsica" style:display-name="[PLOE] Taula Bàsica" style:family="paragraph" style:parent-style-name="TableContents">
      <style:text-properties fo:font-size="10.5pt" style:font-size-asian="10.5pt" fo:hyphenate="false"/>
    </style:style>
    <style:style style:name="PLOETaulaBàsicaEncapçalament" style:display-name="[PLOE] Taula Bàsica Encapçalament" style:family="paragraph" style:parent-style-name="PLOETaulaBàsica">
      <style:paragraph-properties fo:text-align="center"/>
      <style:text-properties fo:font-weight="bold" style:font-weight-asian="bold" fo:hyphenate="false"/>
    </style:style>
    <style:style style:name="PLOETaulaBàsicaCentrat" style:display-name="[PLOE] Taula Bàsica Centrat" style:family="paragraph" style:parent-style-name="PLOETaulaBàsica">
      <style:paragraph-properties fo:text-align="center"/>
      <style:text-properties fo:hyphenate="false"/>
    </style:style>
    <style:style style:name="Heading10" style:display-name="Heading 10" style:family="paragraph" style:parent-style-name="Heading" style:next-style-name="Textbody">
      <style:text-properties fo:font-weight="bold" style:font-weight-asian="bold" style:font-weight-complex="bold" fo:hyphenate="false"/>
    </style:style>
    <style:style style:name="PLOERevisióconceptes" style:display-name="[PLOE] Revisió conceptes" style:family="paragraph" style:parent-style-name="PLOECosdelText">
      <style:paragraph-properties fo:border="0.0034in solid #000000" fo:padding="0.0138in" style:shadow="none" fo:margin-bottom="0in">
        <style:tab-stops>
          <style:tab-stop style:type="right" style:position="6.5944in"/>
        </style:tab-stops>
      </style:paragraph-properties>
      <style:text-properties fo:hyphenate="false"/>
    </style:style>
    <style:style style:name="PLOEEncapçalament3" style:display-name="[PLOE] Encapçalament 3" style:family="paragraph" style:parent-style-name="PLOERevisióconceptes" style:next-style-name="PLOEEncapçalament4" style:default-outline-level="3">
      <style:paragraph-properties fo:break-before="page" fo:border="0.0034in solid #000000" fo:padding="0.0416in" style:shadow="none" fo:margin-top="0.0784in" fo:background-color="#CCFFFF">
        <style:background-fill draw:fill="solid" draw:fill-color="#CCFFFF"/>
      </style:paragraph-properties>
      <style:text-properties fo:font-weight="bold" style:font-weight-asian="bold" fo:font-style="italic" style:font-style-asian="italic" fo:font-size="12pt" style:font-size-asian="12pt" fo:hyphenate="false"/>
    </style:style>
    <style:style style:name="PLOEEncapçalament4" style:display-name="[PLOE] Encapçalament 4" style:family="paragraph" style:parent-style-name="PLOERevisióconceptes" style:next-style-name="PLOEUF" style:default-outline-level="4">
      <style:paragraph-properties fo:border="none" fo:padding="0in" style:shadow="none" fo:margin-top="0.1576in" fo:margin-bottom="0.0784in"/>
      <style:text-properties fo:font-weight="bold" style:font-weight-asian="bold" fo:font-style="italic" style:font-style-asian="italic" fo:hyphenate="false"/>
    </style:style>
    <style:style style:name="Sensenom1" style:display-name="Sense nom1" style:family="paragraph" style:parent-style-name="PLOERevisióconceptes">
      <style:text-properties fo:font-weight="bold" style:font-weight-asian="bold" fo:font-style="italic" style:font-style-asian="italic" fo:font-size="10.5pt" style:font-size-asian="10.5pt" fo:hyphenate="false"/>
    </style:style>
    <style:style style:name="PLOETaulaNFAEA1" style:display-name="[PLOE] Taula NF AEA 1" style:family="paragraph" style:parent-style-name="TableContents">
      <style:text-properties fo:font-size="10.5pt" style:font-size-asian="10.5pt" fo:hyphenate="false"/>
    </style:style>
    <style:style style:name="PLOETaulaNFAEA2" style:display-name="[PLOE] Taula NF AEA 2" style:family="paragraph" style:parent-style-name="PLOETaulaNFAEA1">
      <style:paragraph-properties fo:text-align="center"/>
      <style:text-properties fo:hyphenate="false"/>
    </style:style>
    <style:style style:name="PLOETaulaNFAEAEncapçalament1" style:display-name="[PLOE] Taula NF AEA Encapçalament 1" style:family="paragraph" style:parent-style-name="PLOETaulaNFAEA1">
      <style:text-properties fo:font-style="italic" style:font-style-asian="italic" fo:hyphenate="false"/>
    </style:style>
    <style:style style:name="PLOETaulaNFAEAEncapçalament2" style:display-name="[PLOE] Taula NF AEA Encapçalament 2" style:family="paragraph" style:parent-style-name="PLOETaulaNFAEAEncapçalament1" style:next-style-name="Firstlineindent">
      <style:paragraph-properties fo:text-align="center"/>
      <style:text-properties fo:hyphenate="false"/>
    </style:style>
    <style:style style:name="Firstlineindent" style:display-name="First line indent" style:family="paragraph" style:parent-style-name="Textbody">
      <style:paragraph-properties fo:text-indent="0.1965in"/>
      <style:text-properties fo:hyphenate="false"/>
    </style:style>
    <style:style style:name="Sensenom2" style:display-name="Sense nom2" style:family="paragraph" style:parent-style-name="PLOEEncapçalament3" style:default-outline-level="3">
      <style:text-properties fo:hyphenate="false"/>
    </style:style>
    <style:style style:name="Contents2" style:display-name="Contents 2" style:family="paragraph" style:parent-style-name="Index">
      <style:paragraph-properties fo:margin-left="0.1965in">
        <style:tab-stops>
          <style:tab-stop style:type="right" style:leader-style="dotted" style:leader-text="." style:position="6.4972in"/>
        </style:tab-stops>
      </style:paragraph-properties>
      <style:text-properties fo:hyphenate="false"/>
    </style:style>
    <style:style style:name="PLOEÍndex2" style:display-name="[PLOE] Índex 2" style:family="paragraph" style:parent-style-name="PLOEÍndex1">
      <style:paragraph-properties fo:margin-left="0.118in">
        <style:tab-stops>
          <style:tab-stop style:type="right" style:leader-style="dotted" style:leader-text="." style:position="6.5756in"/>
        </style:tab-stops>
      </style:paragraph-properties>
      <style:text-properties fo:font-weight="normal" style:font-weight-asian="normal" fo:hyphenate="false"/>
    </style:style>
    <style:style style:name="PLOECosdeltextambParàgrafsjunts" style:display-name="[PLOE] Cos del text amb Paràgrafs junts" style:family="paragraph" style:parent-style-name="PLOECosdelText">
      <style:paragraph-properties fo:keep-with-next="always"/>
      <style:text-properties fo:hyphenate="false"/>
    </style:style>
    <style:style style:name="PLOESeparaciótaula" style:display-name="[PLOE] Separació taula" style:family="paragraph" style:parent-style-name="PLOECosdelText">
      <style:paragraph-properties fo:margin-bottom="0in"/>
      <style:text-properties fo:hyphenate="false"/>
    </style:style>
    <style:style style:name="Contents3" style:display-name="Contents 3" style:family="paragraph" style:parent-style-name="Index">
      <style:paragraph-properties fo:margin-left="0.393in">
        <style:tab-stops>
          <style:tab-stop style:type="right" style:leader-style="dotted" style:leader-text="." style:position="6.3006in"/>
        </style:tab-stops>
      </style:paragraph-properties>
      <style:text-properties fo:hyphenate="false"/>
    </style:style>
    <style:style style:name="PLOEÍndex3" style:display-name="[PLOE] Índex 3" style:family="paragraph" style:parent-style-name="PLOEÍndex2">
      <style:paragraph-properties fo:margin-left="0in">
        <style:tab-stops>
          <style:tab-stop style:type="right" style:leader-style="dotted" style:leader-text="." style:position="6.6937in"/>
        </style:tab-stops>
      </style:paragraph-properties>
      <style:text-properties fo:font-weight="bold" style:font-weight-asian="bold" fo:hyphenate="false"/>
    </style:style>
    <style:style style:name="Contents4" style:display-name="Contents 4" style:family="paragraph" style:parent-style-name="Index">
      <style:paragraph-properties fo:margin-left="0.5895in">
        <style:tab-stops>
          <style:tab-stop style:type="right" style:leader-style="dotted" style:leader-text="." style:position="6.1041in"/>
        </style:tab-stops>
      </style:paragraph-properties>
      <style:text-properties fo:hyphenate="false"/>
    </style:style>
    <style:style style:name="PLOEEncapçalamentdelíndex" style:display-name="[PLOE] Encapçalament de l'índex" style:family="paragraph" style:parent-style-name="ContentsHeading">
      <style:text-properties fo:hyphenate="false"/>
    </style:style>
    <style:style style:name="PLOEUF" style:display-name="[PLOE] UF" style:family="paragraph" style:parent-style-name="PLOECosdelText">
      <style:text-properties fo:font-size="10.5pt" style:font-size-asian="10.5pt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Piedepágina" style:display-name="Pie de página" style:family="paragraph" style:parent-style-name="HeaderandFooter">
      <style:text-properties fo:hyphenate="false"/>
    </style:style>
    <style:style style:name="Encabezado" style:display-name="Encabezado" style:family="paragraph" style:parent-style-name="HeaderandFooter"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 fo:margin-bottom="0.0833in"/>
      <style:text-properties fo:font-size="18pt" style:font-size-asian="18pt" style:font-size-complex="18pt" fo:hyphenate="false"/>
    </style:style>
    <style:style style:name="NormalTextdoc" style:display-name="Normal;Text doc" style:family="paragraph">
      <style:paragraph-properties fo:widows="2" fo:orphans="2" style:vertical-align="auto"/>
      <style:text-properties style:font-name="Arial" style:font-name-asian="Times" style:font-name-complex="Times New Roman" fo:font-size="10pt" style:font-size-asian="10pt" style:font-size-complex="10pt" fo:hyphenate="true"/>
    </style:style>
    <style:style style:name="DocumentMap" style:display-name="DocumentMap" style:family="paragraph">
      <style:paragraph-properties fo:widows="2" fo:orphans="2" style:vertical-align="auto"/>
      <style:text-properties style:font-name="Times" style:font-name-asian="Times" style:font-name-complex="Times" fo:font-size="10pt" style:font-size-asian="10pt" style:font-size-complex="10pt" fo:language="es" fo:country="ES" fo:hyphenate="true"/>
    </style:style>
    <style:style style:name="Tablaconcuadrícula1" style:display-name="Tabla con cuadrícula1" style:family="paragraph" style:parent-style-name="DocumentMap">
      <style:text-properties fo:hyphenate="true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Sinespaciado" style:display-name="Sin espaciado" style:family="paragraph">
      <style:text-properties fo:hyphenate="false"/>
    </style:style>
    <style:style style:name="Tablanormal1" style:display-name="Tabla normal1" style:family="paragraph">
      <style:paragraph-properties fo:widows="2" fo:orphans="2" style:vertical-align="auto" fo:margin-bottom="0.0833in" fo:line-height="115%"/>
      <style:text-properties style:font-name="Arial" style:font-name-asian="Arial" style:font-name-complex="Arial" fo:font-size="11pt" style:font-size-asian="11pt" style:font-size-complex="11pt" style:language-asian="ca" style:country-asian="ES" fo:hyphenate="true"/>
    </style:style>
    <style:style style:name="PLOEPeudepàginaFitxer" style:display-name="[PLOE] Peu de pàgina Fitxer" style:family="text">
      <style:text-properties fo:font-weight="bold" style:font-weight-asian="bold" fo:font-size="10.5pt" style:font-size-asian="10.5pt"/>
    </style:style>
    <style:style style:name="PLOEPeudepàginaNomFitxer" style:display-name="[PLOE] Peu de pàgina Nom Fitxer" style:family="text" style:parent-style-name="PLOEPeudepàginaFitxer">
      <style:text-properties fo:font-weight="normal" style:font-weight-asian="normal" fo:font-size="10.5pt" style:font-size-asian="10.5pt"/>
    </style:style>
    <style:style style:name="NumberingSymbols" style:display-name="Numbering Symbols" style:family="text"/>
    <style:style style:name="PLOEEncapçalament2Aclariment" style:display-name="[PLOE] Encapçalament 2 Aclariment" style:family="text">
      <style:text-properties fo:font-weight="bold" style:font-weight-asian="bold" fo:font-size="10.5pt" style:font-size-asian="10.5pt"/>
    </style:style>
    <style:style style:name="PLOEUFNom" style:display-name="[PLOE] UF Nom" style:family="text">
      <style:text-properties style:font-name="Liberation Sans" style:font-name-asian="Liberation Sans" style:font-name-complex="Liberation Sans" fo:font-weight="bold" style:font-weight-asian="bold" fo:font-style="normal" style:font-style-asian="normal" style:font-style-complex="normal" fo:font-size="12pt" style:font-size-asian="12pt"/>
    </style:style>
    <style:style style:name="PLOEText" style:display-name="[PLOE] Text" style:family="text">
      <style:text-properties style:font-name="Liberation Sans" style:font-name-asian="Liberation Sans" style:font-name-complex="Liberation Sans" fo:font-weight="normal" style:font-weight-asian="normal" style:font-weight-complex="normal" fo:font-style="normal" style:font-style-asian="normal" style:font-style-complex="normal" fo:font-size="11pt" style:font-size-asian="11pt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PLOEIntroducciódetext" style:display-name="[PLOE] Introducció de text" style:family="text">
      <style:text-properties fo:color="#808080" fo:font-size="10.5pt" style:font-size-asian="10.5pt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PiedepáginaCar" style:display-name="Pie de página Car" style:family="text" style:parent-style-name="Fuentedepárrafopredeter."/>
    <style:style style:name="ListLabel1" style:display-name="ListLabel 1" style:family="text">
      <style:text-properties style:font-name-complex="Times New Roman"/>
    </style:style>
    <style:style style:name="ListLabel2" style:display-name="ListLabel 2" style:family="text">
      <style:text-properties style:font-name-complex="Times New Roman"/>
    </style:style>
    <style:style style:name="ListLabel3" style:display-name="ListLabel 3" style:family="text">
      <style:text-properties style:font-name-complex="Times New Roman"/>
    </style:style>
    <style:style style:name="ListLabel4" style:display-name="ListLabel 4" style:family="text">
      <style:text-properties style:font-name-complex="Times New Roman"/>
    </style:style>
    <style:style style:name="ListLabel5" style:display-name="ListLabel 5" style:family="text">
      <style:text-properties style:font-name-complex="Times New Roman"/>
    </style:style>
    <style:style style:name="ListLabel6" style:display-name="ListLabel 6" style:family="text">
      <style:text-properties style:font-name-complex="Times New Roman"/>
    </style:style>
    <style:style style:name="ListLabel7" style:display-name="ListLabel 7" style:family="text">
      <style:text-properties style:font-name-complex="Times New Roman"/>
    </style:style>
    <style:style style:name="ListLabel8" style:display-name="ListLabel 8" style:family="text">
      <style:text-properties style:font-name-complex="Times New Roman"/>
    </style:style>
    <style:style style:name="ListLabel9" style:display-name="ListLabel 9" style:family="text">
      <style:text-properties style:font-name-complex="Times New Roman"/>
    </style:style>
    <style:style style:name="Títol4Car" style:display-name="Títol 4 Car" style:family="text" style:parent-style-name="Fuentedepárrafopredeter.">
      <style:text-properties style:font-name-complex="Arial" fo:font-weight="bold" style:font-weight-asian="bold" style:font-weight-complex="bold" style:language-asian="ca" style:country-asian="ES"/>
    </style:style>
    <style:style style:name="CapçaleraCar" style:display-name="Capçalera Car" style:family="text" style:parent-style-name="Fuentedepárrafopredeter.">
      <style:text-properties style:language-asian="ca" style:country-asian="ES"/>
    </style:style>
    <style:style style:name="PeuCar" style:display-name="Peu Car" style:family="text" style:parent-style-name="Fuentedepárrafopredeter.">
      <style:text-properties style:language-asian="ca" style:country-asian="ES"/>
    </style:style>
    <style:style style:name="Númerodepágina" style:display-name="Número de página" style:family="text">
      <style:text-properties style:font-name="Arial" style:font-name-asian="Arial" style:font-name-complex="Arial"/>
    </style:style>
    <style:style style:name="IndexLink" style:display-name="Index Link" style:family="text"/>
    <text:list-style style:name="PLOENumeracióEncapçalaments" style:display-name="[PLOE] Numeració Encapçalaments">
      <text:list-level-style-number text:level="1" style:num-prefix=" " style:num-list-format-name="NLF0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 " style:num-suffix=" " style:num-list-format-name="NLF0" style:num-format="1" text:display-levels="2">
        <style:list-level-properties text:space-before="0.1965in" text:min-label-width="0.3548in" text:list-level-position-and-space-mode="label-alignment">
          <style:list-level-label-alignment text:label-followed-by="space" fo:margin-left="0.5513in" fo:text-indent="-0.3548in"/>
        </style:list-level-properties>
      </text:list-level-style-number>
      <text:list-level-style-number text:level="3" style:num-prefix=" " style:num-suffix=" " style:num-list-format-name="NLF0" style:num-format="1" text:display-levels="3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prefix=" " style:num-suffix=" " style:num-list-format-name="NLF0" style:num-format="1" text:display-levels="4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prefix=" " style:num-suffix=" " style:num-list-format-name="NLF0" style:num-format="1" text:display-levels="5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prefix=" " style:num-suffix=" " style:num-list-format-name="NLF0" style:num-format="1" text:display-levels="6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prefix=" " style:num-suffix=" " style:num-list-format-name="NLF0" style:num-format="1" text:display-levels="7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prefix=" " style:num-suffix=" " style:num-list-format-name="NLF0" style:num-format="1" text:display-levels="8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prefix=" " style:num-suffix=" " style:num-list-format-name="NLF0" style:num-format="1" text:display-levels="9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PLOENumeracióLletresMajúscules" style:display-name="[PLOE] Numeració Lletres Majúscules">
      <text:list-level-style-number text:level="1" style:num-suffix=")" style:num-list-format-name="NLF1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list-format-name="NLF1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list-format-name="NLF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list-format-name="NLF1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list-format-name="NLF1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list-format-name="NLF1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list-format-name="NLF1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list-format-name="NLF1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PLOENumeracióLletresMinúscules" style:display-name="[PLOE] Numeració Lletres Minúscules">
      <text:list-level-style-number text:level="1" style:num-suffix=")" style:num-list-format-name="NLF2" style:num-format="a" style:num-letter-sync="true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</text:list-level-style-number>
      <text:list-level-style-number text:level="2" style:num-suffix=")" style:num-list-format-name="NLF2" style:num-format="a" style:num-letter-sync="true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list-format-name="NLF2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list-format-name="NLF2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list-format-name="NLF2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list-format-name="NLF2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list-format-name="NLF2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list-format-name="NLF2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list-format-name="NLF2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PLOENumeracióNúmeros" style:display-name="[PLOE] Numeració Números">
      <text:list-level-style-number text:level="1" style:num-suffix="." style:num-list-format-name="NLF3" style:num-format="1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</text:list-level-style-number>
      <text:list-level-style-number text:level="2" style:num-suffix="." style:num-list-format-name="NLF3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3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3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3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3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3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3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3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5LVL1" style:family="text">
      <style:text-properties style:font-name="DejaVu Sans" style:font-name-asian="OpenSymbol" style:font-name-complex="OpenSymbol"/>
    </style:style>
    <style:style style:name="WW_CharLFO5LVL2" style:family="text">
      <style:text-properties style:font-name="DejaVu Sans" style:font-name-asian="OpenSymbol" style:font-name-complex="OpenSymbol"/>
    </style:style>
    <style:style style:name="WW_CharLFO5LVL3" style:family="text">
      <style:text-properties style:font-name="DejaVu Sans" style:font-name-asian="OpenSymbol" style:font-name-complex="OpenSymbol"/>
    </style:style>
    <style:style style:name="WW_CharLFO5LVL4" style:family="text">
      <style:text-properties style:font-name="DejaVu Sans" style:font-name-asian="OpenSymbol" style:font-name-complex="OpenSymbol"/>
    </style:style>
    <style:style style:name="WW_CharLFO5LVL5" style:family="text">
      <style:text-properties style:font-name="DejaVu Sans" style:font-name-asian="OpenSymbol" style:font-name-complex="OpenSymbol"/>
    </style:style>
    <style:style style:name="WW_CharLFO5LVL6" style:family="text">
      <style:text-properties style:font-name="DejaVu Sans" style:font-name-asian="OpenSymbol" style:font-name-complex="OpenSymbol"/>
    </style:style>
    <style:style style:name="WW_CharLFO5LVL7" style:family="text">
      <style:text-properties style:font-name="DejaVu Sans" style:font-name-asian="OpenSymbol" style:font-name-complex="OpenSymbol"/>
    </style:style>
    <style:style style:name="WW_CharLFO5LVL8" style:family="text">
      <style:text-properties style:font-name="DejaVu Sans" style:font-name-asian="OpenSymbol" style:font-name-complex="OpenSymbol"/>
    </style:style>
    <style:style style:name="WW_CharLFO5LVL9" style:family="text">
      <style:text-properties style:font-name="DejaVu Sans" style:font-name-asian="OpenSymbol" style:font-name-complex="OpenSymbol"/>
    </style:style>
    <text:list-style style:name="PLOELlistanonumerada" style:display-name="[PLOE] Llista no numerada">
      <text:list-level-style-bullet text:level="1" text:style-name="WW_CharLFO5LVL1" text:bullet-char="-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  <style:text-properties style:font-name="DejaVu Sans"/>
      </text:list-level-style-bullet>
      <text:list-level-style-bullet text:level="2" text:style-name="WW_CharLFO5LVL2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DejaVu Sans"/>
      </text:list-level-style-bullet>
      <text:list-level-style-bullet text:level="3" text:style-name="WW_CharLFO5LVL3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DejaVu Sans"/>
      </text:list-level-style-bullet>
      <text:list-level-style-bullet text:level="4" text:style-name="WW_CharLFO5LVL4" text:bullet-char="-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DejaVu Sans"/>
      </text:list-level-style-bullet>
      <text:list-level-style-bullet text:level="5" text:style-name="WW_CharLFO5LVL5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DejaVu Sans"/>
      </text:list-level-style-bullet>
      <text:list-level-style-bullet text:level="6" text:style-name="WW_CharLFO5LVL6" text:bullet-char="-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DejaVu Sans"/>
      </text:list-level-style-bullet>
      <text:list-level-style-bullet text:level="7" text:style-name="WW_CharLFO5LVL7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DejaVu Sans"/>
      </text:list-level-style-bullet>
      <text:list-level-style-bullet text:level="8" text:style-name="WW_CharLFO5LVL8" text:bullet-char="-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DejaVu Sans"/>
      </text:list-level-style-bullet>
      <text:list-level-style-bullet text:level="9" text:style-name="WW_CharLFO5LVL9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DejaVu Sans"/>
      </text:list-level-style-bullet>
    </text:list-style>
    <text:list-style style:name="PLOENumeracióNúmeros2" style:display-name="[PLOE] Numeració Números 2">
      <text:list-level-style-number text:level="1" style:num-suffix=")" style:num-list-format-name="NLF1" style:num-format="1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)" style:num-list-format-name="NLF1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list-format-name="NLF1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list-format-name="NLF1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list-format-name="NLF1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7LVL1" style:family="text">
      <style:text-properties style:font-name-complex="Times New Roman"/>
    </style:style>
    <style:style style:name="WW_CharLFO7LVL2" style:family="text">
      <style:text-properties style:font-name-complex="Times New Roman"/>
    </style:style>
    <style:style style:name="WW_CharLFO7LVL3" style:family="text">
      <style:text-properties style:font-name-complex="Times New Roman"/>
    </style:style>
    <style:style style:name="WW_CharLFO7LVL4" style:family="text">
      <style:text-properties style:font-name-complex="Times New Roman"/>
    </style:style>
    <style:style style:name="WW_CharLFO7LVL5" style:family="text">
      <style:text-properties style:font-name-complex="Times New Roman"/>
    </style:style>
    <style:style style:name="WW_CharLFO7LVL6" style:family="text">
      <style:text-properties style:font-name-complex="Times New Roman"/>
    </style:style>
    <style:style style:name="WW_CharLFO7LVL7" style:family="text">
      <style:text-properties style:font-name-complex="Times New Roman"/>
    </style:style>
    <style:style style:name="WW_CharLFO7LVL8" style:family="text">
      <style:text-properties style:font-name-complex="Times New Roman"/>
    </style:style>
    <style:style style:name="WW_CharLFO7LVL9" style:family="text">
      <style:text-properties style:font-name-complex="Times New Roman"/>
    </style:style>
    <text:list-style style:name="WWNum1" style:display-name="WWNum1">
      <text:list-level-style-number text:level="1" text:style-name="WW_CharLFO7LVL1" style:num-suffix="." style:num-list-format-name="NLF3" style:num-format="1" text:start-value="0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7LVL2" style:num-suffix="." style:num-list-format-name="NLF3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7LVL3" style:num-suffix="." style:num-list-format-name="NLF3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7LVL4" style:num-suffix="." style:num-list-format-name="NLF3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7LVL5" style:num-suffix="." style:num-list-format-name="NLF3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7LVL6" style:num-suffix="." style:num-list-format-name="NLF3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7LVL7" style:num-suffix="." style:num-list-format-name="NLF3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7LVL8" style:num-suffix="." style:num-list-format-name="NLF3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7LVL9" style:num-suffix="." style:num-list-format-name="NLF3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Capçalera" style:display-name="Capçalera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apçaleraCar1" style:display-name="Capçalera Car1" style:family="text" style:parent-style-name="Lletraperdefectedelparàgraf"/>
    <style:style style:name="Peu" style:display-name="Peu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PeuCar1" style:display-name="Peu Car1" style:family="text" style:parent-style-name="Lletraperdefectedelparàgraf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number:num-list-format style:name="NLF0">
      <number:num-list-label text:level="1"/>
      <number:text> %1%</number:text>
      <number:num-list-label text:level="2"/>
      <number:text> %1%.%2% </number:text>
      <number:num-list-label text:level="3"/>
      <number:text> %1%.%2%.%3% </number:text>
      <number:num-list-label text:level="4"/>
      <number:text> %1%.%2%.%3%.%4% </number:text>
      <number:num-list-label text:level="5"/>
      <number:text> %1%.%2%.%3%.%4%.%5% </number:text>
      <number:num-list-label text:level="6"/>
      <number:text> %1%.%2%.%3%.%4%.%5%.%6% </number:text>
      <number:num-list-label text:level="7"/>
      <number:text> %1%.%2%.%3%.%4%.%5%.%6%.%7% </number:text>
      <number:num-list-label text:level="8"/>
      <number:text> %1%.%2%.%3%.%4%.%5%.%6%.%7%.%8% </number:text>
      <number:num-list-label text:level="9"/>
      <number:text> %1%.%2%.%3%.%4%.%5%.%6%.%7%.%8%.%9% </number:text>
    </number:num-list-format>
    <number:num-list-format style:name="NLF1">
      <number:num-list-label text:level="1"/>
      <number:text>%1%)</number:text>
      <number:num-list-label text:level="2"/>
      <number:text>%2%)</number:text>
      <number:num-list-label text:level="3"/>
      <number:text>%3%)</number:text>
      <number:num-list-label text:level="4"/>
      <number:text>%4%)</number:text>
      <number:num-list-label text:level="5"/>
      <number:text>%5%)</number:text>
      <number:num-list-label text:level="6"/>
      <number:text>%6%)</number:text>
      <number:num-list-label text:level="7"/>
      <number:text>%7%)</number:text>
      <number:num-list-label text:level="8"/>
      <number:text>%8%)</number:text>
      <number:num-list-label text:level="9"/>
      <number:text>%9%)</number:text>
    </number:num-list-format>
    <number:num-list-format style:name="NLF2">
      <number:num-list-label text:level="1"/>
      <number:text>%1%)</number:text>
      <number:num-list-label text:level="2"/>
      <number:text>%1%.%2%)</number:text>
      <number:num-list-label text:level="3"/>
      <number:text>%3%)</number:text>
      <number:num-list-label text:level="4"/>
      <number:text>%4%)</number:text>
      <number:num-list-label text:level="5"/>
      <number:text>%5%)</number:text>
      <number:num-list-label text:level="6"/>
      <number:text>%6%)</number:text>
      <number:num-list-label text:level="7"/>
      <number:text>%7%)</number:text>
      <number:num-list-label text:level="8"/>
      <number:text>%8%)</number:text>
      <number:num-list-label text:level="9"/>
      <number:text>%9%)</number:text>
    </number:num-list-format>
    <number:num-list-format style:name="NLF3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4923in" fo:margin-left="0.984in" fo:margin-bottom="0.5513in" fo:margin-right="0.590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3in"/>
      </style:header-style>
      <style:footer-style>
        <style:header-footer-properties style:dynamic-spacing="true" fo:min-height="-0.059in"/>
      </style:footer-style>
    </style:page-layout>
    <style:style style:name="P2" style:parent-style-name="PLOEPeudepàgina2" style:family="paragraph">
      <style:paragraph-properties fo:text-align="end" fo:margin-left="0in">
        <style:tab-stops>
          <style:tab-stop style:type="center" style:position="3.7402in"/>
          <style:tab-stop style:type="right" style:position="7.4805in"/>
        </style:tab-stops>
      </style:paragraph-properties>
    </style:style>
  </office:automatic-styles>
  <office:master-styles>
    <style:master-page style:name="MP0" style:page-layout-name="PL0">
      <style:header>
        <text:p text:style-name="PLOECapçalera">MÒDUL XXXXX:<text:tab/>&lt;denominació del mòdul&gt;</text:p>
        <text:p text:style-name="PLOECapçalera"/>
        <text:p text:style-name="PLOECapçalera"/>
      </style:header>
      <style:footer>
        <text:p text:style-name="P2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meta:initial-creator>Maica Sanz</meta:initial-creator>
    <dc:creator>Maica Sanz</dc:creator>
    <meta:creation-date>2026-04-09T10:55:00Z</meta:creation-date>
    <dc:date>2026-04-09T10:55:00Z</dc:date>
    <meta:template xlink:href="Normal" xlink:type="simple"/>
    <meta:editing-cycles>2</meta:editing-cycles>
    <meta:editing-duration>PT0S</meta:editing-duration>
    <meta:document-statistic meta:page-count="1" meta:paragraph-count="1" meta:word-count="85" meta:character-count="571" meta:row-count="4" meta:non-whitespace-character-count="487"/>
  </office:meta>
</office:document-meta>
</file>