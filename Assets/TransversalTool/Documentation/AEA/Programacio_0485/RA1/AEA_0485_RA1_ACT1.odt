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Variables i estructura del moviment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Partint d'un script donat, l'alumnat identifica estructura, variables i constants i ajusta el moviment del personatg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1/AEA_0485_RA1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