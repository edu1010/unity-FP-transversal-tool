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Spawner de monedes amb bucl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Implementació d'un spawner amb bucles i condicions; la funcionalitat de recollida de moneda es proporcio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3/AEA_0485_RA3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