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3_ACT3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Control de flux i col·lisions del 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ores (2 sessions de 4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implementa estructures de selecció i repetició per gestionar col·lisions, pèrdua de vides, reinici de nivell i control d'errors bàsics en scripts C# del projecte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,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: Escriu i depura codi, analitzant i utilitzant les estructures de control del llenguatge.</text:p>
          </table:table-cell>
          <table:table-cell table:style-name="TableCell43" table:number-columns-spanned="3">
            <text:p text:style-name="P44">- Escriu i prova codi que faci ús d'estructures de selecció.</text:p>
            <text:p text:style-name="P44">- Utilitza estructures de repetició.</text:p>
            <text:p text:style-name="P44">- Reconeix les possibilitats de les sentències de salt.</text:p>
            <text:p text:style-name="P44">- Escriu codi fent servir control d'excepcions.</text:p>
            <text:p text:style-name="P44">- Crea programes executables fent servir diferents estructures de control.</text:p>
            <text:p text:style-name="P44">- Prova i depura els programes.</text:p>
            <text:p text:style-name="P44">- Comenta i documenta el codi.</text:p>
            <text:p text:style-name="P44">- Crea excepcions.</text:p>
            <text:p text:style-name="P44">- Utilitza assercions per detectar i corregir errors.</text:p>
          </table:table-cell>
          <table:covered-table-cell/>
          <table:covered-table-cell/>
          <table:table-cell table:style-name="TableCell45" table:number-rows-spanned="3">
            <text:p text:style-name="P46">- Estructures if/else i switch aplicades a lògica de joc.</text:p>
            <text:p text:style-name="P46">- Bucles i sentències de control de flux.</text:p>
            <text:p text:style-name="P46">- Gestió bàsica d'excepcions i depuració.</text:p>
            <text:p text:style-name="P46">- Comentaris i documentació del codi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Iniciativa</text:p>
            <text:p text:style-name="P48">- Autonomia</text:p>
            <text:p text:style-name="P48">- Pensament lògic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sintaxi C# bàsica, mètodes i classes simples, execució de proves a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Anàlisi de casos de joc (col·lisió, vida, derrota)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ABP</text:p>
          </table:table-cell>
          <table:table-cell table:style-name="TableCell97">
            <text:p text:style-name="P98">Escena de prova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Implementació de selecció (if/switch) per estats de partida.</text:p>
          </table:table-cell>
          <table:table-cell table:style-name="TableCell104">
            <text:p text:style-name="P105">Individual</text:p>
          </table:table-cell>
          <table:table-cell table:style-name="TableCell106" table:number-columns-spanned="2">
            <text:p text:style-name="P107">90 min</text:p>
          </table:table-cell>
          <table:covered-table-cell/>
          <table:table-cell table:style-name="TableCell108">
            <text:p text:style-name="P109">Pràctica guiada</text:p>
          </table:table-cell>
          <table:table-cell table:style-name="TableCell110">
            <text:p text:style-name="P111">Unity + IDE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Implementació de bucles i validacions de flux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60 min</text:p>
          </table:table-cell>
          <table:covered-table-cell/>
          <table:table-cell table:style-name="TableCell121">
            <text:p text:style-name="P122">Tasques seqüenciades</text:p>
          </table:table-cell>
          <table:table-cell table:style-name="TableCell123">
            <text:p text:style-name="P124">Scripts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Depuració: breakpoints, logs i assert.</text:p>
          </table:table-cell>
          <table:table-cell table:style-name="TableCell130">
            <text:p text:style-name="P131">Parelles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Peer debugging</text:p>
          </table:table-cell>
          <table:table-cell table:style-name="TableCell136">
            <text:p text:style-name="P137">Debugger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Control d'excepcions i millora de robustesa.</text:p>
          </table:table-cell>
          <table:table-cell table:style-name="TableCell143">
            <text:p text:style-name="P144">Individual</text:p>
          </table:table-cell>
          <table:table-cell table:style-name="TableCell145" table:number-columns-spanned="2">
            <text:p text:style-name="P146">45 min</text:p>
          </table:table-cell>
          <table:covered-table-cell/>
          <table:table-cell table:style-name="TableCell147">
            <text:p text:style-name="P148">Pràctica iterativa</text:p>
          </table:table-cell>
          <table:table-cell table:style-name="TableCell149">
            <text:p text:style-name="P150">Consola Unity</text:p>
          </table:table-cell>
          <table:table-cell table:style-name="TableCell151">
            <text:p text:style-name="P152">Aula informàtica</text:p>
          </table:table-cell>
        </table:table-row>
        <table:table-row table:style-name="TableRow153">
          <table:table-cell table:style-name="TableCell154">
            <text:p text:style-name="P155">Lliurament, proves finals i autoavaluació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 taller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cena de prova amb objectes de col·lisió.</text:p>
            <text:p text:style-name="P168">- Guia curta de depuració a Unity.</text:p>
            <text:p text:style-name="P168">- Fitxa de comprovació de casos de prov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control de flux i depuració.</text:p>
            <text:p text:style-name="P172">- Casos de prova obligatoris.</text:p>
            <text:p text:style-name="P172">- Observació del procés de resolu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Codi base amb esquelet de condicions.</text:p>
            <text:p text:style-name="P176">- Temps addicional per finalitzar proves.</text:p>
            <text:p text:style-name="P176">- Repte d'ampliació: màquina d'estats simp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