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PROG_RA3_ACT3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'activitat: Control de flux i col·lisions del joc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8 hores (2 sessions de 4 h)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L'alumnat implementa estructures de selecció i repetició per gestionar col·lisions, pèrdua de vides, reinici de nivell i control d'errors bàsics en scripts C# del projecte Unity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, ODS 9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3: Escriu i depura codi, analitzant i utilitzant les estructures de control del llenguatge.</text:p>
          </table:table-cell>
          <table:table-cell table:style-name="TableCell43" table:number-columns-spanned="3">
            <text:p text:style-name="P44">- Escriu i prova codi que faci ús d'estructures de selecció.</text:p>
            <text:p text:style-name="P44">- Utilitza estructures de repetició.</text:p>
            <text:p text:style-name="P44">- Reconeix les possibilitats de les sentències de salt.</text:p>
            <text:p text:style-name="P44">- Escriu codi fent servir control d'excepcions.</text:p>
            <text:p text:style-name="P44">- Crea programes executables fent servir diferents estructures de control.</text:p>
            <text:p text:style-name="P44">- Prova i depura els programes.</text:p>
            <text:p text:style-name="P44">- Comenta i documenta el codi.</text:p>
            <text:p text:style-name="P44">- Crea excepcions.</text:p>
            <text:p text:style-name="P44">- Utilitza assercions per detectar i corregir errors.</text:p>
          </table:table-cell>
          <table:covered-table-cell/>
          <table:covered-table-cell/>
          <table:table-cell table:style-name="TableCell45" table:number-rows-spanned="3">
            <text:p text:style-name="P46">- Estructures if/else i switch aplicades a lògica de joc.</text:p>
            <text:p text:style-name="P46">- Bucles i sentències de control de flux.</text:p>
            <text:p text:style-name="P46">- Gestió bàsica d'excepcions i depuració.</text:p>
            <text:p text:style-name="P46">- Comentaris i documentació del codi.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Iniciativa</text:p>
            <text:p text:style-name="P48">- Autonomia</text:p>
            <text:p text:style-name="P48">- Pensament lògic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r components de programari o dades de manera fiable; resoldre incidències tècniques; treballar col·laborativament; documentar i comunicar solucions en context professional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tècnics en contextos reals, crear productes digitals funcionals, verificar-ne la qualitat i mantenir bones pràctiques de desenvolupament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sintaxi C# bàsica, mètodes i classes simples, execució de proves a Unity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Anàlisi de casos de joc (col·lisió, vida, derrota).</text:p>
          </table:table-cell>
          <table:table-cell table:style-name="TableCell91">
            <text:p text:style-name="P92">Gran grup</text:p>
          </table:table-cell>
          <table:table-cell table:style-name="TableCell93" table:number-columns-spanned="2">
            <text:p text:style-name="P94">30 min</text:p>
          </table:table-cell>
          <table:covered-table-cell/>
          <table:table-cell table:style-name="TableCell95">
            <text:p text:style-name="P96">ABP</text:p>
          </table:table-cell>
          <table:table-cell table:style-name="TableCell97">
            <text:p text:style-name="P98">Escena de prova</text:p>
          </table:table-cell>
          <table:table-cell table:style-name="TableCell99">
            <text:p text:style-name="P100">Aula taller</text:p>
          </table:table-cell>
        </table:table-row>
        <table:table-row table:style-name="TableRow101">
          <table:table-cell table:style-name="TableCell102">
            <text:p text:style-name="P103">Implementació de selecció (if/switch) per estats de partida.</text:p>
          </table:table-cell>
          <table:table-cell table:style-name="TableCell104">
            <text:p text:style-name="P105">Individual</text:p>
          </table:table-cell>
          <table:table-cell table:style-name="TableCell106" table:number-columns-spanned="2">
            <text:p text:style-name="P107">90 min</text:p>
          </table:table-cell>
          <table:covered-table-cell/>
          <table:table-cell table:style-name="TableCell108">
            <text:p text:style-name="P109">Pràctica guiada</text:p>
          </table:table-cell>
          <table:table-cell table:style-name="TableCell110">
            <text:p text:style-name="P111">Unity + IDE</text:p>
          </table:table-cell>
          <table:table-cell table:style-name="TableCell112">
            <text:p text:style-name="P113">Aula informàtica</text:p>
          </table:table-cell>
        </table:table-row>
        <table:table-row table:style-name="TableRow114">
          <table:table-cell table:style-name="TableCell115">
            <text:p text:style-name="P116">Implementació de bucles i validacions de flux.</text:p>
          </table:table-cell>
          <table:table-cell table:style-name="TableCell117">
            <text:p text:style-name="P118">Individual</text:p>
          </table:table-cell>
          <table:table-cell table:style-name="TableCell119" table:number-columns-spanned="2">
            <text:p text:style-name="P120">60 min</text:p>
          </table:table-cell>
          <table:covered-table-cell/>
          <table:table-cell table:style-name="TableCell121">
            <text:p text:style-name="P122">Tasques seqüenciades</text:p>
          </table:table-cell>
          <table:table-cell table:style-name="TableCell123">
            <text:p text:style-name="P124">Scripts</text:p>
          </table:table-cell>
          <table:table-cell table:style-name="TableCell125">
            <text:p text:style-name="P126">Aula informàtica</text:p>
          </table:table-cell>
        </table:table-row>
        <table:table-row table:style-name="TableRow127">
          <table:table-cell table:style-name="TableCell128">
            <text:p text:style-name="P129">Depuració: breakpoints, logs i assert.</text:p>
          </table:table-cell>
          <table:table-cell table:style-name="TableCell130">
            <text:p text:style-name="P131">Parelles</text:p>
          </table:table-cell>
          <table:table-cell table:style-name="TableCell132" table:number-columns-spanned="2">
            <text:p text:style-name="P133">60 min</text:p>
          </table:table-cell>
          <table:covered-table-cell/>
          <table:table-cell table:style-name="TableCell134">
            <text:p text:style-name="P135">Peer debugging</text:p>
          </table:table-cell>
          <table:table-cell table:style-name="TableCell136">
            <text:p text:style-name="P137">Debugger</text:p>
          </table:table-cell>
          <table:table-cell table:style-name="TableCell138">
            <text:p text:style-name="P139">Aula informàtica</text:p>
          </table:table-cell>
        </table:table-row>
        <table:table-row table:style-name="TableRow140">
          <table:table-cell table:style-name="TableCell141">
            <text:p text:style-name="P142">Control d'excepcions i millora de robustesa.</text:p>
          </table:table-cell>
          <table:table-cell table:style-name="TableCell143">
            <text:p text:style-name="P144">Individual</text:p>
          </table:table-cell>
          <table:table-cell table:style-name="TableCell145" table:number-columns-spanned="2">
            <text:p text:style-name="P146">45 min</text:p>
          </table:table-cell>
          <table:covered-table-cell/>
          <table:table-cell table:style-name="TableCell147">
            <text:p text:style-name="P148">Pràctica iterativa</text:p>
          </table:table-cell>
          <table:table-cell table:style-name="TableCell149">
            <text:p text:style-name="P150">Consola Unity</text:p>
          </table:table-cell>
          <table:table-cell table:style-name="TableCell151">
            <text:p text:style-name="P152">Aula informàtica</text:p>
          </table:table-cell>
        </table:table-row>
        <table:table-row table:style-name="TableRow153">
          <table:table-cell table:style-name="TableCell154">
            <text:p text:style-name="P155">Lliurament, proves finals i autoavaluació.</text:p>
          </table:table-cell>
          <table:table-cell table:style-name="TableCell156">
            <text:p text:style-name="P157">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Tancament</text:p>
          </table:table-cell>
          <table:table-cell table:style-name="TableCell162">
            <text:p text:style-name="P163">Rúbrica</text:p>
          </table:table-cell>
          <table:table-cell table:style-name="TableCell164">
            <text:p text:style-name="P165">Aula taller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cena de prova amb objectes de col·lisió.</text:p>
            <text:p text:style-name="P168">- Guia curta de depuració a Unity.</text:p>
            <text:p text:style-name="P168">- Fitxa de comprovació de casos de prov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</text:p>
            <text:p text:style-name="P172">- Rúbrica de control de flux i depuració.</text:p>
            <text:p text:style-name="P172">- Casos de prova obligatoris.</text:p>
            <text:p text:style-name="P172">- Observació del procés de resolu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Codi base amb esquelet de condicions.</text:p>
            <text:p text:style-name="P176">- Temps addicional per finalitzar proves.</text:p>
            <text:p text:style-name="P176">- Repte d'ampliació: màquina d'estats simp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Programacio 0485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