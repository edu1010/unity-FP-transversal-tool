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PROG_RA3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Spawner de monedes amb bucle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5 ho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Es practica l’ús de bucles i condicions implementant un spawner. La funcionalitat de moneda es dona fe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3: Escriu i depura codi, analitzant i utilitzant les estructures de control del llenguatge.</text:p>
          </table:table-cell>
          <table:table-cell table:style-name="TableCell43" table:number-columns-spanned="3">
            <text:p text:style-name="P44">- Escriu codi que fa ús d’estructures de repetició.</text:p>
            <text:p text:style-name="P44">- Prova i depura el comportament de l’script.</text:p>
            <text:p text:style-name="P44">- Comenta i documenta el codi essencial.</text:p>
          </table:table-cell>
          <table:covered-table-cell/>
          <table:covered-table-cell/>
          <table:table-cell table:style-name="TableCell45" table:number-rows-spanned="3">
            <text:p text:style-name="P46">- Bucle for.</text:p>
            <text:p text:style-name="P46">- Condicions de validació bàsiques.</text:p>
            <text:p text:style-name="P46">- Instanciació d’objectes a Unity.</text:p>
          </table:table-cell>
          <table:table-cell table:style-name="TableCell47" table:number-columns-spanned="2" table:number-rows-spanned="3">
            <text:p text:style-name="P48">- Resolució de problemes</text:p>
            <text:p text:style-name="P48">- Competència digital</text:p>
            <text:p text:style-name="P48">- Treball autònom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resolució de problemes, treball autònom, qualitat del codi i comunicació tècnic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 de projecte Unity i lliurar evidències avaluable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 de variables i funcions bàsiqu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ABP</text:p>
          </table:table-cell>
          <table:table-cell table:style-name="TableCell97">
            <text:p text:style-name="P98">Enunciat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Revisió funció moneda donada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20 min</text:p>
          </table:table-cell>
          <table:covered-table-cell/>
          <table:table-cell table:style-name="TableCell108">
            <text:p text:style-name="P109">Lectura codi</text:p>
          </table:table-cell>
          <table:table-cell table:style-name="TableCell110">
            <text:p text:style-name="P111">TransversalCoinPickupGiven</text:p>
          </table:table-cell>
          <table:table-cell table:style-name="TableCell112">
            <text:p text:style-name="P113">Aula TIC</text:p>
          </table:table-cell>
        </table:table-row>
        <table:table-row table:style-name="TableRow114">
          <table:table-cell table:style-name="TableCell115">
            <text:p text:style-name="P116">Implementació del bucle for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Aula TIC</text:p>
          </table:table-cell>
        </table:table-row>
        <table:table-row table:style-name="TableRow127">
          <table:table-cell table:style-name="TableCell128">
            <text:p text:style-name="P129">Proves i depuració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60 min</text:p>
          </table:table-cell>
          <table:covered-table-cell/>
          <table:table-cell table:style-name="TableCell134">
            <text:p text:style-name="P135">Iteratiu</text:p>
          </table:table-cell>
          <table:table-cell table:style-name="TableCell136">
            <text:p text:style-name="P137">Play Mode</text:p>
          </table:table-cell>
          <table:table-cell table:style-name="TableCell138">
            <text:p text:style-name="P139">Aula TIC</text:p>
          </table:table-cell>
        </table:table-row>
        <table:table-row table:style-name="TableRow140">
          <table:table-cell table:style-name="TableCell141">
            <text:p text:style-name="P142">Coavaluació</text:p>
          </table:table-cell>
          <table:table-cell table:style-name="TableCell143">
            <text:p text:style-name="P144">Parelles</text:p>
          </table:table-cell>
          <table:table-cell table:style-name="TableCell145" table:number-columns-spanned="2">
            <text:p text:style-name="P146">30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Aula TIC</text:p>
          </table:table-cell>
        </table:table-row>
        <table:table-row table:style-name="TableRow153">
          <table:table-cell table:style-name="TableCell154">
            <text:p text:style-name="P155">Lliurament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20 min</text:p>
          </table:table-cell>
          <table:covered-table-cell/>
          <table:table-cell table:style-name="TableCell160">
            <text:p text:style-name="P161">Tancament</text:p>
          </table:table-cell>
          <table:table-cell table:style-name="TableCell162">
            <text:p text:style-name="P163">Checklist</text:p>
          </table:table-cell>
          <table:table-cell table:style-name="TableCell164">
            <text:p text:style-name="P165">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Programming_RA3_BuclesSpawner.md</text:p>
            <text:p text:style-name="P168">- TransversalCoinSpawnerTemplate.c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de bucles</text:p>
            <text:p text:style-name="P172">- Observació de depuració</text:p>
            <text:p text:style-name="P172">- Prova funcional en escen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Número de monedes reduït per adaptació</text:p>
            <text:p text:style-name="P176">- Pseudocodi de suport</text:p>
            <text:p text:style-name="P176">- Extensió opcional: spawn 2 fi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Programacio 0485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