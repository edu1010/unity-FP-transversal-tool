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5_RA5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Entrada/sortida de fitxer de configuració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Lectura i escriptura d'un fitxer de configuració del joc i validació de valors d'entr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5</text:p>
          </table:table-cell>
          <table:table-cell table:style-name="TableCell43" table:number-columns-spanned="3">
            <text:p text:style-name="P44">- Relaciona elements del llenguatge amb el problema plantejat.</text:p>
            <text:p text:style-name="P44">- Implementa codi funcional i depurat.</text:p>
            <text:p text:style-name="P44">- Documenta decisions bàsiques de desenvolupament.</text:p>
          </table:table-cell>
          <table:covered-table-cell/>
          <table:covered-table-cell/>
          <table:table-cell table:style-name="TableCell45" table:number-rows-spanned="3">
            <text:p text:style-name="P46">- C# en Unity</text:p>
            <text:p text:style-name="P46">- Bones pràctiques de codi</text:p>
            <text:p text:style-name="P46">- Proves i depuració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Programacio_0485/RA5/AEA_0485_RA5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Programacio 0485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