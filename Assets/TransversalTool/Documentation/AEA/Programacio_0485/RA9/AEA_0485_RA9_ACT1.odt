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5_RA9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Integració amb base de dades de resultat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8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Inserció, consulta i actualització de resultats de partida mantenint integritat de dad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9</text:p>
          </table:table-cell>
          <table:table-cell table:style-name="TableCell43" table:number-columns-spanned="3">
            <text:p text:style-name="P44">- Relaciona elements del llenguatge amb el problema plantejat.</text:p>
            <text:p text:style-name="P44">- Implementa codi funcional i depurat.</text:p>
            <text:p text:style-name="P44">- Documenta decisions bàsiques de desenvolupament.</text:p>
          </table:table-cell>
          <table:covered-table-cell/>
          <table:covered-table-cell/>
          <table:table-cell table:style-name="TableCell45" table:number-rows-spanned="3">
            <text:p text:style-name="P46">- C# en Unity</text:p>
            <text:p text:style-name="P46">- Bones pràctiques de codi</text:p>
            <text:p text:style-name="P46">- Proves i depuració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Programacio_0485/RA9/AEA_0485_RA9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