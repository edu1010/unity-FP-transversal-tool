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9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Integració amb base de dades de resultat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Inserció, consulta i actualització de resultats de partida mantenint integritat de d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9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9/AEA_0485_RA9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