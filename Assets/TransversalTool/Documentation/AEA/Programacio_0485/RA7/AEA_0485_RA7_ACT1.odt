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7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Herència i polimorfisme d'enemic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Creació d'una jerarquia d'enemics amb comportaments comuns i especialitzat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7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7/AEA_0485_RA7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