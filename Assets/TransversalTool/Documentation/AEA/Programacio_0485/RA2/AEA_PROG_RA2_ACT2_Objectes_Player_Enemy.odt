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PROG_RA2_ACT2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'activitat: Objectes Player i Enemy (POO bàsica)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8 hores (2 sessions de 4 h)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L'alumnat crea i prova scripts en C# basats en objectes (Player i Enemy) dins Unity, definint atributs, mètodes, constructors i crides entre objectes per gestionar vida, dany i estat del personatg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, ODS 9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2: Escriu i prova programes senzills, reconeixent i aplicant els fonaments de la programació orientada a objectes.</text:p>
          </table:table-cell>
          <table:table-cell table:style-name="TableCell43" table:number-columns-spanned="3">
            <text:p text:style-name="P44">- Identifica els fonaments de la programació orientada a objectes.</text:p>
            <text:p text:style-name="P44">- Escriu programes simples.</text:p>
            <text:p text:style-name="P44">- Instancia objectes a partir de classes predefinides.</text:p>
            <text:p text:style-name="P44">- Utilitza mètodes i propietats dels objectes.</text:p>
            <text:p text:style-name="P44">- Escriu crides a mètodes estàtics.</text:p>
            <text:p text:style-name="P44">- Utilitza paràmetres a la crida a mètodes.</text:p>
            <text:p text:style-name="P44">- Incorpora i utilitza llibreries d'objectes.</text:p>
            <text:p text:style-name="P44">- Utilitza constructors.</text:p>
            <text:p text:style-name="P44">- Utilitza l'entorn integrat de desenvolupament per crear i compilar programes simples.</text:p>
          </table:table-cell>
          <table:covered-table-cell/>
          <table:covered-table-cell/>
          <table:table-cell table:style-name="TableCell45" table:number-rows-spanned="3">
            <text:p text:style-name="P46">- Classes, objectes, propietats i mètodes en C#.</text:p>
            <text:p text:style-name="P46">- Constructors i pas de paràmetres.</text:p>
            <text:p text:style-name="P46">- Crides a mètodes estàtics i d'instància.</text:p>
            <text:p text:style-name="P46">- Compilació i prova funcional a Unity.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  <text:p text:style-name="P48">- Pensament crític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r components de programari o dades de manera fiable; resoldre incidències tècniques; treballar col·laborativament; documentar i comunicar solucions en context professional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tècnics en contextos reals, crear productes digitals funcionals, verificar-ne la qualitat i mantenir bones pràctiques de desenvolupament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nocions de variables, tipus i operadors; coneixement bàsic de Unity i de l'ID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 i anàlisi del diagrama de classes simple.</text:p>
          </table:table-cell>
          <table:table-cell table:style-name="TableCell91">
            <text:p text:style-name="P92">Gran grup</text:p>
          </table:table-cell>
          <table:table-cell table:style-name="TableCell93" table:number-columns-spanned="2">
            <text:p text:style-name="P94">30 min</text:p>
          </table:table-cell>
          <table:covered-table-cell/>
          <table:table-cell table:style-name="TableCell95">
            <text:p text:style-name="P96">Exposició guiada</text:p>
          </table:table-cell>
          <table:table-cell table:style-name="TableCell97">
            <text:p text:style-name="P98">Projector + pissarra</text:p>
          </table:table-cell>
          <table:table-cell table:style-name="TableCell99">
            <text:p text:style-name="P100">Aula taller</text:p>
          </table:table-cell>
        </table:table-row>
        <table:table-row table:style-name="TableRow101">
          <table:table-cell table:style-name="TableCell102">
            <text:p text:style-name="P103">Creació de classes Player i Enemy amb propietats i constructors.</text:p>
          </table:table-cell>
          <table:table-cell table:style-name="TableCell104">
            <text:p text:style-name="P105">Individual</text:p>
          </table:table-cell>
          <table:table-cell table:style-name="TableCell106" table:number-columns-spanned="2">
            <text:p text:style-name="P107">90 min</text:p>
          </table:table-cell>
          <table:covered-table-cell/>
          <table:table-cell table:style-name="TableCell108">
            <text:p text:style-name="P109">Pràctica guiada</text:p>
          </table:table-cell>
          <table:table-cell table:style-name="TableCell110">
            <text:p text:style-name="P111">Unity + IDE</text:p>
          </table:table-cell>
          <table:table-cell table:style-name="TableCell112">
            <text:p text:style-name="P113">Aula informàtica</text:p>
          </table:table-cell>
        </table:table-row>
        <table:table-row table:style-name="TableRow114">
          <table:table-cell table:style-name="TableCell115">
            <text:p text:style-name="P116">Implementació de mètodes de dany i recuperació de vida.</text:p>
          </table:table-cell>
          <table:table-cell table:style-name="TableCell117">
            <text:p text:style-name="P118">Individual</text:p>
          </table:table-cell>
          <table:table-cell table:style-name="TableCell119" table:number-columns-spanned="2">
            <text:p text:style-name="P120">90 min</text:p>
          </table:table-cell>
          <table:covered-table-cell/>
          <table:table-cell table:style-name="TableCell121">
            <text:p text:style-name="P122">ABT (tasques)</text:p>
          </table:table-cell>
          <table:table-cell table:style-name="TableCell123">
            <text:p text:style-name="P124">Scripts plantilla</text:p>
          </table:table-cell>
          <table:table-cell table:style-name="TableCell125">
            <text:p text:style-name="P126">Aula informàtica</text:p>
          </table:table-cell>
        </table:table-row>
        <table:table-row table:style-name="TableRow127">
          <table:table-cell table:style-name="TableCell128">
            <text:p text:style-name="P129">Proves en escena i depuració de comportaments.</text:p>
          </table:table-cell>
          <table:table-cell table:style-name="TableCell130">
            <text:p text:style-name="P131">Parelles</text:p>
          </table:table-cell>
          <table:table-cell table:style-name="TableCell132" table:number-columns-spanned="2">
            <text:p text:style-name="P133">60 min</text:p>
          </table:table-cell>
          <table:covered-table-cell/>
          <table:table-cell table:style-name="TableCell134">
            <text:p text:style-name="P135">Coavaluació</text:p>
          </table:table-cell>
          <table:table-cell table:style-name="TableCell136">
            <text:p text:style-name="P137">Consola Unity</text:p>
          </table:table-cell>
          <table:table-cell table:style-name="TableCell138">
            <text:p text:style-name="P139">Aula informàtica</text:p>
          </table:table-cell>
        </table:table-row>
        <table:table-row table:style-name="TableRow140">
          <table:table-cell table:style-name="TableCell141">
            <text:p text:style-name="P142">Refactorització curta i comentaris de codi.</text:p>
          </table:table-cell>
          <table:table-cell table:style-name="TableCell143">
            <text:p text:style-name="P144">Individual</text:p>
          </table:table-cell>
          <table:table-cell table:style-name="TableCell145" table:number-columns-spanned="2">
            <text:p text:style-name="P146">30 min</text:p>
          </table:table-cell>
          <table:covered-table-cell/>
          <table:table-cell table:style-name="TableCell147">
            <text:p text:style-name="P148">Millora iterativa</text:p>
          </table:table-cell>
          <table:table-cell table:style-name="TableCell149">
            <text:p text:style-name="P150">Checklist codi</text:p>
          </table:table-cell>
          <table:table-cell table:style-name="TableCell151">
            <text:p text:style-name="P152">Aula informàtica</text:p>
          </table:table-cell>
        </table:table-row>
        <table:table-row table:style-name="TableRow153">
          <table:table-cell table:style-name="TableCell154">
            <text:p text:style-name="P155">Lliurament i autoavaluació.</text:p>
          </table:table-cell>
          <table:table-cell table:style-name="TableCell156">
            <text:p text:style-name="P157">Individual</text:p>
          </table:table-cell>
          <table:table-cell table:style-name="TableCell158" table:number-columns-spanned="2">
            <text:p text:style-name="P159">30 min</text:p>
          </table:table-cell>
          <table:covered-table-cell/>
          <table:table-cell table:style-name="TableCell160">
            <text:p text:style-name="P161">Metacognició</text:p>
          </table:table-cell>
          <table:table-cell table:style-name="TableCell162">
            <text:p text:style-name="P163">Rúbrica</text:p>
          </table:table-cell>
          <table:table-cell table:style-name="TableCell164">
            <text:p text:style-name="P165">Aula taller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nunciat docent de l'activitat PROG_RA2_ACT2.</text:p>
            <text:p text:style-name="P168">- Projecte base Unity i scripts de suport.</text:p>
            <text:p text:style-name="P168">- Guia Unity del projecte transvers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</text:p>
            <text:p text:style-name="P172">- Rúbrica de codi orientat a objectes.</text:p>
            <text:p text:style-name="P172">- Llista de verificació funcional en mode Play.</text:p>
            <text:p text:style-name="P172">- Observació directa i registre d'incidènci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de classes per alumnat NESE.</text:p>
            <text:p text:style-name="P176">- Parelles heterogènies amb rols definits.</text:p>
            <text:p text:style-name="P176">- Ampliació opcional: herència entre enemic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