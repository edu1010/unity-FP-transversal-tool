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2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Objectes Player i Enemy (POO bàsica)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rea i prova scripts en C# basats en objectes (Player i Enemy) dins Unity, definint atributs, mètodes, constructors i crides entre objectes per gestionar vida, dany i estat del person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Escriu i prova programes senzills, reconeixent i aplicant els fonaments de la programació orientada a objectes.</text:p>
          </table:table-cell>
          <table:table-cell table:style-name="TableCell43" table:number-columns-spanned="3">
            <text:p text:style-name="P44">- Identifica els fonaments de la programació orientada a objectes.</text:p>
            <text:p text:style-name="P44">- Escriu programes simples.</text:p>
            <text:p text:style-name="P44">- Instancia objectes a partir de classes predefinides.</text:p>
            <text:p text:style-name="P44">- Utilitza mètodes i propietats dels objectes.</text:p>
            <text:p text:style-name="P44">- Escriu crides a mètodes estàtics.</text:p>
            <text:p text:style-name="P44">- Utilitza paràmetres a la crida a mètodes.</text:p>
            <text:p text:style-name="P44">- Incorpora i utilitza llibreries d'objectes.</text:p>
            <text:p text:style-name="P44">- Utilitza constructors.</text:p>
            <text:p text:style-name="P44">- Utilitza l'entorn integrat de desenvolupament per crear i compilar programes simples.</text:p>
          </table:table-cell>
          <table:covered-table-cell/>
          <table:covered-table-cell/>
          <table:table-cell table:style-name="TableCell45" table:number-rows-spanned="3">
            <text:p text:style-name="P46">- Classes, objectes, propietats i mètodes en C#.</text:p>
            <text:p text:style-name="P46">- Constructors i pas de paràmetres.</text:p>
            <text:p text:style-name="P46">- Crides a mètodes estàtics i d'instància.</text:p>
            <text:p text:style-name="P46">- Compilació i prova funcional a Unity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  <text:p text:style-name="P48">- Pensament crít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de variables, tipus i operadors; coneixement bàsic de Unity i de l'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diagrama de classes simple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Exposició guiada</text:p>
          </table:table-cell>
          <table:table-cell table:style-name="TableCell97">
            <text:p text:style-name="P98">Projector + pissarr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reació de classes Player i Enemy amb propietats i constructors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mètodes de dany i recuperació de vida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90 min</text:p>
          </table:table-cell>
          <table:covered-table-cell/>
          <table:table-cell table:style-name="TableCell121">
            <text:p text:style-name="P122">ABT (tasques)</text:p>
          </table:table-cell>
          <table:table-cell table:style-name="TableCell123">
            <text:p text:style-name="P124">Scripts plantilla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 en escena i depuració de comportaments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Coavaluació</text:p>
          </table:table-cell>
          <table:table-cell table:style-name="TableCell136">
            <text:p text:style-name="P137">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factorització curta i comentaris de codi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Millora iterativa</text:p>
          </table:table-cell>
          <table:table-cell table:style-name="TableCell149">
            <text:p text:style-name="P150">Checklist codi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30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 docent de l'activitat PROG_RA2_ACT2.</text:p>
            <text:p text:style-name="P168">- Projecte base Unity i scripts de suport.</text:p>
            <text:p text:style-name="P168">- Guia Unity del projecte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orientat a objectes.</text:p>
            <text:p text:style-name="P172">- Llista de verificació funcional en mode Play.</text:p>
            <text:p text:style-name="P172">- Observació directa i registre d'incidènc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de classes per alumnat NESE.</text:p>
            <text:p text:style-name="P176">- Parelles heterogènies amb rols definits.</text:p>
            <text:p text:style-name="P176">- Ampliació opcional: herència entre enemic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