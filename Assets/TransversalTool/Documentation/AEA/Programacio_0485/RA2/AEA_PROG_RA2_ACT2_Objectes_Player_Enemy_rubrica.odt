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PROG_RA2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Objectes Player i Enem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PROG_RA2_ACT2_Objectes_Player_Enemy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el domini dels fonaments de POO aplicats a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efinició de classes, propietats i constructors</text:p>
          </table:table-cell>
          <table:table-cell table:style-name="TableCell91">
            <text:p text:style-name="P92">Classes completes, coherents i reutilitzables</text:p>
          </table:table-cell>
          <table:table-cell table:style-name="TableCell93" table:number-columns-spanned="2">
            <text:p text:style-name="P94">Classes funcionals amb petits errors</text:p>
          </table:table-cell>
          <table:covered-table-cell/>
          <table:table-cell table:style-name="TableCell95">
            <text:p text:style-name="P96">Definició incompleta o amb errors greus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Ús de mètodes i instanciació d'objectes</text:p>
          </table:table-cell>
          <table:table-cell table:style-name="TableCell104">
            <text:p text:style-name="P105">Interacció correcta entre objectes</text:p>
          </table:table-cell>
          <table:table-cell table:style-name="TableCell106" table:number-columns-spanned="2">
            <text:p text:style-name="P107">Funciona amb incidències menors</text:p>
          </table:table-cell>
          <table:covered-table-cell/>
          <table:table-cell table:style-name="TableCell108">
            <text:p text:style-name="P109">No hi ha interacció consistent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Proves, depuració i documentació</text:p>
          </table:table-cell>
          <table:table-cell table:style-name="TableCell117">
            <text:p text:style-name="P118">Proves completes i codi ben comentat</text:p>
          </table:table-cell>
          <table:table-cell table:style-name="TableCell119" table:number-columns-spanned="2">
            <text:p text:style-name="P120">Proves bàsiques i comentaris parcials</text:p>
          </table:table-cell>
          <table:covered-table-cell/>
          <table:table-cell table:style-name="TableCell121">
            <text:p text:style-name="P122">Sense proves o sense document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 rúbrica d'ús docent vinculada a l'AEA correspon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