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POO bàsica amb Player i Enemy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crea classes simples, instancia objectes i prova mètodes per gestionar comportaments bàsics del jo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2/AEA_0485_RA2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