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5_RA2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POO bàsica amb Player i Enemy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8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L'alumnat crea classes simples, instancia objectes i prova mètodes per gestionar comportaments bàsics del joc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2</text:p>
          </table:table-cell>
          <table:table-cell table:style-name="TableCell43" table:number-columns-spanned="3">
            <text:p text:style-name="P44">- Relaciona elements del llenguatge amb el problema plantejat.</text:p>
            <text:p text:style-name="P44">- Implementa codi funcional i depurat.</text:p>
            <text:p text:style-name="P44">- Documenta decisions bàsiques de desenvolupament.</text:p>
          </table:table-cell>
          <table:covered-table-cell/>
          <table:covered-table-cell/>
          <table:table-cell table:style-name="TableCell45" table:number-rows-spanned="3">
            <text:p text:style-name="P46">- C# en Unity</text:p>
            <text:p text:style-name="P46">- Bones pràctiques de codi</text:p>
            <text:p text:style-name="P46">- Proves i depuració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Programacio_0485/RA2/AEA_0485_RA2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Programacio 0485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