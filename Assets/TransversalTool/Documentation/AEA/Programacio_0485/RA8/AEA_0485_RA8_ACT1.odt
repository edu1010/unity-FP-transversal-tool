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8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Persistència orientada a object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Modelatge d'objectes de domini i estratègies de persistència amb serialització i mapatge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8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8/AEA_0485_RA8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