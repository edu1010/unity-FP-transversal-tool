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6 Accés a dades (1r DAM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AD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Guardar i recuperar savegame a BD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 partir del JSON creat prèviament, l’alumnat implementa un component d’accés a dades per inserir i recuperar snapsho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: Programa components d'accés a dades identificant les característiques que ha de posseir un component i utilitzant eines de desenvolupament.</text:p>
          </table:table-cell>
          <table:table-cell table:style-name="TableCell43" table:number-columns-spanned="3">
            <text:p text:style-name="P44">- Identifica responsabilitats del component d’accés a dades.</text:p>
            <text:p text:style-name="P44">- Implementa operacions de persistència i recuperació.</text:p>
            <text:p text:style-name="P44">- Utilitza sentències parametritzades i estructura clara.</text:p>
            <text:p text:style-name="P44">- Documenta i prova el component creat.</text:p>
          </table:table-cell>
          <table:covered-table-cell/>
          <table:covered-table-cell/>
          <table:table-cell table:style-name="TableCell45" table:number-rows-spanned="3">
            <text:p text:style-name="P46">- Component repositori en C#.</text:p>
            <text:p text:style-name="P46">- Inserció i consulta SQL.</text:p>
            <text:p text:style-name="P46">- Integració amb dades serialitzades.</text:p>
          </table:table-cell>
          <table:table-cell table:style-name="TableCell47" table:number-columns-spanned="2" table:number-rows-spanned="3">
            <text:p text:style-name="P48">- Pensament analític</text:p>
            <text:p text:style-name="P48">- Rigor tècnic</text:p>
            <text:p text:style-name="P48">- Competència digital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JSON de savegame creat i coneixement SQL bàsi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 cas d’ús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Enunciat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Revisió d’esquema SQL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Anàlisi</text:p>
          </table:table-cell>
          <table:table-cell table:style-name="TableCell110">
            <text:p text:style-name="P111">Template SQL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Implementació SaveSnapshot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IDE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Implementació LoadLatestSnapshot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70 min</text:p>
          </table:table-cell>
          <table:covered-table-cell/>
          <table:table-cell table:style-name="TableCell134">
            <text:p text:style-name="P135">Pràctica</text:p>
          </table:table-cell>
          <table:table-cell table:style-name="TableCell136">
            <text:p text:style-name="P137">IDE + SQL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Proves de persistència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40 min</text:p>
          </table:table-cell>
          <table:covered-table-cell/>
          <table:table-cell table:style-name="TableCell147">
            <text:p text:style-name="P148">Test funcional</text:p>
          </table:table-cell>
          <table:table-cell table:style-name="TableCell149">
            <text:p text:style-name="P150">Dades prova</text:p>
          </table:table-cell>
          <table:table-cell table:style-name="TableCell151">
            <text:p text:style-name="P152">Aula TIC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AccessData_RA6_SavegameDB.md</text:p>
            <text:p text:style-name="P168">- SaveGameRepositoryTemplate.cs</text:p>
            <text:p text:style-name="P168">- SaveGameSnapshotTemplate.sq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e component</text:p>
            <text:p text:style-name="P172">- Checklist SQL</text:p>
            <text:p text:style-name="P172">- Resultat de prov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seudocodi de mètodes</text:p>
            <text:p text:style-name="P176">- Consulta SQL base donada</text:p>
            <text:p text:style-name="P176">- Extensió opcional: versió de snapsh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