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Automatització amb procediments i trigger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efinició de procediments/trigger per calcular puntuació acumulada i auditar canvi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5/AEA_0484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