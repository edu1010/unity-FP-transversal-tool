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Consultes SQL de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nstrucció de consultes simples, joins i agregacions per obtenir mètriques del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3/AEA_0484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