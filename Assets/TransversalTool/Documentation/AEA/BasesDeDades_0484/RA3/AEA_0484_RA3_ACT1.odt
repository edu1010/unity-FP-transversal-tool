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Consultes SQL de rànquing i progré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onstrucció de consultes simples, joins i agregacions per obtenir mètriques del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3/AEA_0484_RA3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