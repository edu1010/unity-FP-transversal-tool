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BDD_RA3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Consultes SQL de rànquing i progré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 (2 sessions de 3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onstrueix consultes SQL per obtenir classificacions, estadístiques i progrés de partides del joc, incloent joins, agregacions i subconsul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: Consulta la informació emmagatzemada en una base de dades fent servir assistents, eines gràfiques i el llenguatge de manipulació de dades.</text:p>
          </table:table-cell>
          <table:table-cell table:style-name="TableCell43" table:number-columns-spanned="3">
            <text:p text:style-name="P44">- Identifica les eines i sentències per fer consultes.</text:p>
            <text:p text:style-name="P44">- Fa consultes simples sobre una taula.</text:p>
            <text:p text:style-name="P44">- Fa consultes amb composicions internes.</text:p>
            <text:p text:style-name="P44">- Fa consultes amb composicions externes.</text:p>
            <text:p text:style-name="P44">- Fa consultes resum.</text:p>
            <text:p text:style-name="P44">- Fa consultes amb subconsultes.</text:p>
            <text:p text:style-name="P44">- Fa consultes amb múltiples seleccions.</text:p>
            <text:p text:style-name="P44">- Aplica criteris d'optimització de consultes.</text:p>
          </table:table-cell>
          <table:covered-table-cell/>
          <table:covered-table-cell/>
          <table:table-cell table:style-name="TableCell45" table:number-rows-spanned="3">
            <text:p text:style-name="P46">- SELECT, WHERE i ORDER BY.</text:p>
            <text:p text:style-name="P46">- JOIN intern i extern.</text:p>
            <text:p text:style-name="P46">- GROUP BY, funcions d'agregació i HAVING.</text:p>
            <text:p text:style-name="P46">- Subconsultes i criteris d'optimització.</text:p>
          </table:table-cell>
          <table:table-cell table:style-name="TableCell47" table:number-columns-spanned="2" table:number-rows-spanned="3">
            <text:p text:style-name="P48">- Pensament analític</text:p>
            <text:p text:style-name="P48">- Competència digital</text:p>
            <text:p text:style-name="P48">- Rigor</text:p>
            <text:p text:style-name="P48">- Autonomia</text:p>
            <text:p text:style-name="P48">- Resolució de problemes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model relacional creat i dades de prova carreg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Definició de preguntes funcionals del joc (rànquing, millors temps)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Enunciat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Consultes bàsiques i filtratge sobre una taula.</text:p>
          </table:table-cell>
          <table:table-cell table:style-name="TableCell104">
            <text:p text:style-name="P105">Individual</text:p>
          </table:table-cell>
          <table:table-cell table:style-name="TableCell106" table:number-columns-spanned="2">
            <text:p text:style-name="P107">50 min</text:p>
          </table:table-cell>
          <table:covered-table-cell/>
          <table:table-cell table:style-name="TableCell108">
            <text:p text:style-name="P109">Pràctica guiada</text:p>
          </table:table-cell>
          <table:table-cell table:style-name="TableCell110">
            <text:p text:style-name="P111">SGBD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Consultes amb joins entre jugadors, nivells i partides.</text:p>
          </table:table-cell>
          <table:table-cell table:style-name="TableCell117">
            <text:p text:style-name="P118">Parelles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ABT</text:p>
          </table:table-cell>
          <table:table-cell table:style-name="TableCell123">
            <text:p text:style-name="P124">Scripts SQL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Consultes resum i subconsultes de rendiment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Resolució de reptes</text:p>
          </table:table-cell>
          <table:table-cell table:style-name="TableCell136">
            <text:p text:style-name="P137">Dades de prova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Optimització bàsica i comparació de solucions.</text:p>
          </table:table-cell>
          <table:table-cell table:style-name="TableCell143">
            <text:p text:style-name="P144">Gran grup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Debat tècnic</text:p>
          </table:table-cell>
          <table:table-cell table:style-name="TableCell149">
            <text:p text:style-name="P150">Projector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defensa breu d'una consulta clau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0 min</text:p>
          </table:table-cell>
          <table:covered-table-cell/>
          <table:table-cell table:style-name="TableCell160">
            <text:p text:style-name="P161">Exposició curta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Fitxer de dades de prova del joc.</text:p>
            <text:p text:style-name="P168">- Guia de consultes SQL (joins i agregacions).</text:p>
            <text:p text:style-name="P168">- Plantilla de lliurament amb consultes coment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qualitat de consultes SQL.</text:p>
            <text:p text:style-name="P172">- Bateria de casos de validació de resultats.</text:p>
            <text:p text:style-name="P172">- Observació de l'argumentació tècnic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Consultes model parcials per suport inicial.</text:p>
            <text:p text:style-name="P176">- Temps ampliat en la part d'optimització.</text:p>
            <text:p text:style-name="P176">- Repte d'ampliació: vista materialitzada simul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