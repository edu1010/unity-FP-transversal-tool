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7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Emmagatzematge no relacional d'esdeveniment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Disseny d'un esquema NoSQL per logs d'esdeveniments i telemetria de joc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7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7/AEA_0484_RA7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