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mmagatzematge no relacional d'esdevenimen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d'un esquema NoSQL per logs d'esdeveniments i telemetria de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7/AEA_0484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