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Anàlisi de sistemes gestors per al video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omparació de SGBD i selecció d'una opció adequada per emmagatzemar dades del projec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1/AEA_0484_RA1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