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4 Bases de dades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BDD_RA2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'activitat: Model relacional inicial del videojoc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ores (2 sessions de 3 h)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L'alumnat dissenya i implementa l'esquema relacional inicial (jugadors, nivells, partides i puntuacions) per donar suport al projecte Unity transvers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, ODS 9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2: Crea bases de dades definint-ne l'estructura i les característiques dels elements segons el model relacional.</text:p>
          </table:table-cell>
          <table:table-cell table:style-name="TableCell43" table:number-columns-spanned="3">
            <text:p text:style-name="P44">- Analitza el format d'emmagatzematge de la informació.</text:p>
            <text:p text:style-name="P44">- Crea les taules i les relacions entre elles.</text:p>
            <text:p text:style-name="P44">- Selecciona els tipus de dades adequades.</text:p>
            <text:p text:style-name="P44">- Defineix els camps clau a les taules.</text:p>
            <text:p text:style-name="P44">- Implanta les restriccions reflectides al disseny lògic.</text:p>
            <text:p text:style-name="P44">- Crea vistes.</text:p>
            <text:p text:style-name="P44">- Crea els usuaris i els assigna privilegis.</text:p>
            <text:p text:style-name="P44">- Utilitza assistents, eines gràfiques i llenguatges de definició/control de dades.</text:p>
          </table:table-cell>
          <table:covered-table-cell/>
          <table:covered-table-cell/>
          <table:table-cell table:style-name="TableCell45" table:number-rows-spanned="3">
            <text:p text:style-name="P46">- Model relacional: taules, claus primàries i foranes.</text:p>
            <text:p text:style-name="P46">- Tipus de dades i restriccions d'integritat.</text:p>
            <text:p text:style-name="P46">- DDL i DCL bàsic en SQLite/MySQL.</text:p>
            <text:p text:style-name="P46">- Creació de vistes inicials per al rànquing.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Planificació</text:p>
            <text:p text:style-name="P48">- Rigor tècnic</text:p>
            <text:p text:style-name="P48">- Resolució de problemes</text:p>
            <text:p text:style-name="P48">- Treball col·laboratiu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r components de programari o dades de manera fiable; resoldre incidències tècniques; treballar col·laborativament; documentar i comunicar solucions en context professional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tècnics en contextos reals, crear productes digitals funcionals, verificar-ne la qualitat i mantenir bones pràctiques de desenvolupament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ceptes bàsics de taules, camps, claus i comandes SQL de crea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Lectura de requisits del joc i identificació d'entitats.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30 min</text:p>
          </table:table-cell>
          <table:covered-table-cell/>
          <table:table-cell table:style-name="TableCell95">
            <text:p text:style-name="P96">Anàlisi guiada</text:p>
          </table:table-cell>
          <table:table-cell table:style-name="TableCell97">
            <text:p text:style-name="P98">Enunciat BDD</text:p>
          </table:table-cell>
          <table:table-cell table:style-name="TableCell99">
            <text:p text:style-name="P100">Aula taller</text:p>
          </table:table-cell>
        </table:table-row>
        <table:table-row table:style-name="TableRow101">
          <table:table-cell table:style-name="TableCell102">
            <text:p text:style-name="P103">Disseny E/R simple i pas a model relacional.</text:p>
          </table:table-cell>
          <table:table-cell table:style-name="TableCell104">
            <text:p text:style-name="P105">Parelles</text:p>
          </table:table-cell>
          <table:table-cell table:style-name="TableCell106" table:number-columns-spanned="2">
            <text:p text:style-name="P107">60 min</text:p>
          </table:table-cell>
          <table:covered-table-cell/>
          <table:table-cell table:style-name="TableCell108">
            <text:p text:style-name="P109">Aprenentatge cooperatiu</text:p>
          </table:table-cell>
          <table:table-cell table:style-name="TableCell110">
            <text:p text:style-name="P111">Pissarra + paper</text:p>
          </table:table-cell>
          <table:table-cell table:style-name="TableCell112">
            <text:p text:style-name="P113">Aula</text:p>
          </table:table-cell>
        </table:table-row>
        <table:table-row table:style-name="TableRow114">
          <table:table-cell table:style-name="TableCell115">
            <text:p text:style-name="P116">Implementació SQL de taules i restriccions.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6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SGBD + IDE SQL</text:p>
          </table:table-cell>
          <table:table-cell table:style-name="TableCell125">
            <text:p text:style-name="P126">Aula informàtica</text:p>
          </table:table-cell>
        </table:table-row>
        <table:table-row table:style-name="TableRow127">
          <table:table-cell table:style-name="TableCell128">
            <text:p text:style-name="P129">Creació de vistes i comprovació d'integritat.</text:p>
          </table:table-cell>
          <table:table-cell table:style-name="TableCell130">
            <text:p text:style-name="P131">Individual</text:p>
          </table:table-cell>
          <table:table-cell table:style-name="TableCell132" table:number-columns-spanned="2">
            <text:p text:style-name="P133">45 min</text:p>
          </table:table-cell>
          <table:covered-table-cell/>
          <table:table-cell table:style-name="TableCell134">
            <text:p text:style-name="P135">Tasques</text:p>
          </table:table-cell>
          <table:table-cell table:style-name="TableCell136">
            <text:p text:style-name="P137">Scripts SQL</text:p>
          </table:table-cell>
          <table:table-cell table:style-name="TableCell138">
            <text:p text:style-name="P139">Aula informàtica</text:p>
          </table:table-cell>
        </table:table-row>
        <table:table-row table:style-name="TableRow140">
          <table:table-cell table:style-name="TableCell141">
            <text:p text:style-name="P142">Revisió entre iguals del model i de claus.</text:p>
          </table:table-cell>
          <table:table-cell table:style-name="TableCell143">
            <text:p text:style-name="P144">Parelles</text:p>
          </table:table-cell>
          <table:table-cell table:style-name="TableCell145" table:number-columns-spanned="2">
            <text:p text:style-name="P146">30 min</text:p>
          </table:table-cell>
          <table:covered-table-cell/>
          <table:table-cell table:style-name="TableCell147">
            <text:p text:style-name="P148">Coavaluació</text:p>
          </table:table-cell>
          <table:table-cell table:style-name="TableCell149">
            <text:p text:style-name="P150">Rúbrica</text:p>
          </table:table-cell>
          <table:table-cell table:style-name="TableCell151">
            <text:p text:style-name="P152">Aula</text:p>
          </table:table-cell>
        </table:table-row>
        <table:table-row table:style-name="TableRow153">
          <table:table-cell table:style-name="TableCell154">
            <text:p text:style-name="P155">Lliurament i debat final d'alternatives de disseny.</text:p>
          </table:table-cell>
          <table:table-cell table:style-name="TableCell156">
            <text:p text:style-name="P157">Gran grup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Posada en comú</text:p>
          </table:table-cell>
          <table:table-cell table:style-name="TableCell162">
            <text:p text:style-name="P163">Projector</text:p>
          </table:table-cell>
          <table:table-cell table:style-name="TableCell164">
            <text:p text:style-name="P165">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Assets/TransversalTool/Documentation/Statements/Databases_RA2.md</text:p>
            <text:p text:style-name="P168">- Plantilla SQL de l'activitat.</text:p>
            <text:p text:style-name="P168">- Guia de nomenclatura de taules i camp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</text:p>
            <text:p text:style-name="P172">- Rúbrica de model relacional i DDL.</text:p>
            <text:p text:style-name="P172">- Checklist de validació de claus i restriccions.</text:p>
            <text:p text:style-name="P172">- Revisió de codi SQL per parell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Esquelet SQL inicial per alumnat que ho necessiti.</text:p>
            <text:p text:style-name="P176">- Grups de suport per resolució de dubtes.</text:p>
            <text:p text:style-name="P176">- Ampliació: afegir taula d'inventari i relacion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