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del relacional inicial del video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issenya i implementa l'esquema relacional inicial (jugadors, nivells, partides i puntuacions) per donar suport al projecte Unity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Crea bases de dades definint-ne l'estructura i les característiques dels elements segons el model relacional.</text:p>
          </table:table-cell>
          <table:table-cell table:style-name="TableCell43" table:number-columns-spanned="3">
            <text:p text:style-name="P44">- Analitza el format d'emmagatzematge de la informació.</text:p>
            <text:p text:style-name="P44">- Crea les taules i les relacions entre elles.</text:p>
            <text:p text:style-name="P44">- Selecciona els tipus de dades adequades.</text:p>
            <text:p text:style-name="P44">- Defineix els camps clau a les taules.</text:p>
            <text:p text:style-name="P44">- Implanta les restriccions reflectides al disseny lògic.</text:p>
            <text:p text:style-name="P44">- Crea vistes.</text:p>
            <text:p text:style-name="P44">- Crea els usuaris i els assigna privilegis.</text:p>
            <text:p text:style-name="P44">- Utilitza assistents, eines gràfiques i llenguatges de definició/control de dades.</text:p>
          </table:table-cell>
          <table:covered-table-cell/>
          <table:covered-table-cell/>
          <table:table-cell table:style-name="TableCell45" table:number-rows-spanned="3">
            <text:p text:style-name="P46">- Model relacional: taules, claus primàries i foranes.</text:p>
            <text:p text:style-name="P46">- Tipus de dades i restriccions d'integritat.</text:p>
            <text:p text:style-name="P46">- DDL i DCL bàsic en SQLite/MySQL.</text:p>
            <text:p text:style-name="P46">- Creació de vistes inicials per al rànquing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lanificació</text:p>
            <text:p text:style-name="P48">- Rigor tècnic</text:p>
            <text:p text:style-name="P48">- Resolució de problemes</text:p>
            <text:p text:style-name="P48">- Treball col·labo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ceptes bàsics de taules, camps, claus i comandes SQL de cre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Lectura de requisits del joc i identificació d'entitat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nàlisi guiada</text:p>
          </table:table-cell>
          <table:table-cell table:style-name="TableCell97">
            <text:p text:style-name="P98">Enunciat BDD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Disseny E/R simple i pas a model relacional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Pissarra + paper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Implementació SQL de taules i restriccion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SGBD + IDE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reació de vistes i comprovació d'integrita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Tasques</text:p>
          </table:table-cell>
          <table:table-cell table:style-name="TableCell136">
            <text:p text:style-name="P137">Scripts SQL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del model i de clau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bat final d'alternatives de disseny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Posada en comú</text:p>
          </table:table-cell>
          <table:table-cell table:style-name="TableCell162">
            <text:p text:style-name="P163">Projector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Databases_RA2.md</text:p>
            <text:p text:style-name="P168">- Plantilla SQL de l'activitat.</text:p>
            <text:p text:style-name="P168">- Guia de nomenclatura de taules i cam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model relacional i DDL.</text:p>
            <text:p text:style-name="P172">- Checklist de validació de claus i restriccions.</text:p>
            <text:p text:style-name="P172">- Revisió de codi SQL per parel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let SQL inicial per alumnat que ho necessiti.</text:p>
            <text:p text:style-name="P176">- Grups de suport per resolució de dubtes.</text:p>
            <text:p text:style-name="P176">- Ampliació: afegir taula d'inventari i rel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