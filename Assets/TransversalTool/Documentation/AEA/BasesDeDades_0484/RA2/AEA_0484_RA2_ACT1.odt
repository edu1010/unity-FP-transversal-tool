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4_RA2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Model relacional inicial del joc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Disseny i creació de taules, claus i relacions per jugadors, nivells, partides i puntuacion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2</text:p>
          </table:table-cell>
          <table:table-cell table:style-name="TableCell43" table:number-columns-spanned="3">
            <text:p text:style-name="P44">- Modela dades de manera coherent amb el cas d'ús.</text:p>
            <text:p text:style-name="P44">- Construeix consultes/operacions correctes i verificables.</text:p>
            <text:p text:style-name="P44">- Assegura integritat i consistència de la informació.</text:p>
          </table:table-cell>
          <table:covered-table-cell/>
          <table:covered-table-cell/>
          <table:table-cell table:style-name="TableCell45" table:number-rows-spanned="3">
            <text:p text:style-name="P46">- Model relacional/NoSQL</text:p>
            <text:p text:style-name="P46">- SQL i integritat</text:p>
            <text:p text:style-name="P46">- Disseny de dades del joc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BasesDeDades_0484/RA2/AEA_0484_RA2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Bases De Dades 0484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