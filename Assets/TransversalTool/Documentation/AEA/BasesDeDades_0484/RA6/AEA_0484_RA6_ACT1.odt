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Normalització del model E/R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nversió d'un diagrama E/R al model relacional aplicant normalització i restri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6/AEA_0484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