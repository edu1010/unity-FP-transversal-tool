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373 Llenguatges de marques i sistemes de gestió d’infor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LM_RA4_ACT2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'activitat: Validació d'esquemes de configuració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ores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L'alumnat defineix un esquema de validació per als fitxers de configuració del projecte, comprova documents i registra errors de sintaxi i estructur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 i ODS 9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4: Estableix mecanismes de validació de documents per a l'intercanvi d'informació utilitzant mètodes per definir-ne la sintaxi i l'estructura.</text:p>
          </table:table-cell>
          <table:table-cell table:style-name="TableCell43" table:number-columns-spanned="3">
            <text:p text:style-name="P44">- Estableix la necessitat de descriure la informació transmesa i les seves regles.</text:p>
            <text:p text:style-name="P44">- Identifica tecnologies relacionades amb la definició de documents.</text:p>
            <text:p text:style-name="P44">- Analitza l'estructura i la sintaxi específica utilitzada en la descripció.</text:p>
            <text:p text:style-name="P44">- Crea descripcions de documents.</text:p>
            <text:p text:style-name="P44">- Utilitza descripcions en l'elaboració i validació de documents.</text:p>
            <text:p text:style-name="P44">- Associa les descripcions amb els documents.</text:p>
            <text:p text:style-name="P44">- Utilitza eines específiques de validació.</text:p>
          </table:table-cell>
          <table:covered-table-cell/>
          <table:covered-table-cell/>
          <table:table-cell table:style-name="TableCell45" table:number-rows-spanned="3">
            <text:p text:style-name="P46">- Definició de regles d'estructura per documents d'intercanvi.</text:p>
            <text:p text:style-name="P46">- Esquemes de validació (JSON Schema / alternatives equivalents).</text:p>
            <text:p text:style-name="P46">- Procés de validació i tractament d'errors.</text:p>
            <text:p text:style-name="P46">- Documentació de criteris de qualitat del fitxer.</text:p>
          </table:table-cell>
          <table:table-cell table:style-name="TableCell47" table:number-columns-spanned="2" table:number-rows-spanned="3">
            <text:p text:style-name="P48">- Rigor</text:p>
            <text:p text:style-name="P48">- Competència digital</text:p>
            <text:p text:style-name="P48">- Resolució de problemes</text:p>
            <text:p text:style-name="P48">- Autonomia</text:p>
            <text:p text:style-name="P48">- Comunicació tècnic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r components de programari o dades de manera fiable; resoldre incidències tècniques; treballar col·laborativament; documentar i comunicar solucions en context professional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tècnics en contextos reals, crear productes digitals funcionals, verificar-ne la qualitat i mantenir bones pràctiques de desenvolupament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 bàsic de JSON i validació de sintaxi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problema de validació en configuracions.</text:p>
          </table:table-cell>
          <table:table-cell table:style-name="TableCell91">
            <text:p text:style-name="P92">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Estudi de cas</text:p>
          </table:table-cell>
          <table:table-cell table:style-name="TableCell97">
            <text:p text:style-name="P98">Exemple d'error</text:p>
          </table:table-cell>
          <table:table-cell table:style-name="TableCell99">
            <text:p text:style-name="P100">Aula</text:p>
          </table:table-cell>
        </table:table-row>
        <table:table-row table:style-name="TableRow101">
          <table:table-cell table:style-name="TableCell102">
            <text:p text:style-name="P103">Disseny de regles i atributs obligatoris.</text:p>
          </table:table-cell>
          <table:table-cell table:style-name="TableCell104">
            <text:p text:style-name="P105">Parelles</text:p>
          </table:table-cell>
          <table:table-cell table:style-name="TableCell106" table:number-columns-spanned="2">
            <text:p text:style-name="P107">50 min</text:p>
          </table:table-cell>
          <table:covered-table-cell/>
          <table:table-cell table:style-name="TableCell108">
            <text:p text:style-name="P109">Aprenentatge cooperatiu</text:p>
          </table:table-cell>
          <table:table-cell table:style-name="TableCell110">
            <text:p text:style-name="P111">Guia docent</text:p>
          </table:table-cell>
          <table:table-cell table:style-name="TableCell112">
            <text:p text:style-name="P113">Aula</text:p>
          </table:table-cell>
        </table:table-row>
        <table:table-row table:style-name="TableRow114">
          <table:table-cell table:style-name="TableCell115">
            <text:p text:style-name="P116">Creació d'esquema de validació.</text:p>
          </table:table-cell>
          <table:table-cell table:style-name="TableCell117">
            <text:p text:style-name="P118">Individual</text:p>
          </table:table-cell>
          <table:table-cell table:style-name="TableCell119" table:number-columns-spanned="2">
            <text:p text:style-name="P120">7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Editor + validador</text:p>
          </table:table-cell>
          <table:table-cell table:style-name="TableCell125">
            <text:p text:style-name="P126">Aula informàtica</text:p>
          </table:table-cell>
        </table:table-row>
        <table:table-row table:style-name="TableRow127">
          <table:table-cell table:style-name="TableCell128">
            <text:p text:style-name="P129">Validació de diversos fitxers i registre d'errors.</text:p>
          </table:table-cell>
          <table:table-cell table:style-name="TableCell130">
            <text:p text:style-name="P131">Individual</text:p>
          </table:table-cell>
          <table:table-cell table:style-name="TableCell132" table:number-columns-spanned="2">
            <text:p text:style-name="P133">60 min</text:p>
          </table:table-cell>
          <table:covered-table-cell/>
          <table:table-cell table:style-name="TableCell134">
            <text:p text:style-name="P135">Proves</text:p>
          </table:table-cell>
          <table:table-cell table:style-name="TableCell136">
            <text:p text:style-name="P137">Dades de prova</text:p>
          </table:table-cell>
          <table:table-cell table:style-name="TableCell138">
            <text:p text:style-name="P139">Aula informàtica</text:p>
          </table:table-cell>
        </table:table-row>
        <table:table-row table:style-name="TableRow140">
          <table:table-cell table:style-name="TableCell141">
            <text:p text:style-name="P142">Millora de l'esquema i revisió entre iguals.</text:p>
          </table:table-cell>
          <table:table-cell table:style-name="TableCell143">
            <text:p text:style-name="P144">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Coavaluació</text:p>
          </table:table-cell>
          <table:table-cell table:style-name="TableCell149">
            <text:p text:style-name="P150">Rúbrica</text:p>
          </table:table-cell>
          <table:table-cell table:style-name="TableCell151">
            <text:p text:style-name="P152">Aula</text:p>
          </table:table-cell>
        </table:table-row>
        <table:table-row table:style-name="TableRow153">
          <table:table-cell table:style-name="TableCell154">
            <text:p text:style-name="P155">Lliurament i conclusions.</text:p>
          </table:table-cell>
          <table:table-cell table:style-name="TableCell156">
            <text:p text:style-name="P157">Gran grup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Tancament</text:p>
          </table:table-cell>
          <table:table-cell table:style-name="TableCell162">
            <text:p text:style-name="P163">Checklist</text:p>
          </table:table-cell>
          <table:table-cell table:style-name="TableCell164">
            <text:p text:style-name="P165">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Plantilla de configuració del projecte.</text:p>
            <text:p text:style-name="P168">- Guia d'esquemes de validació utilitzada al mòdul.</text:p>
            <text:p text:style-name="P168">- Informe breu d'errors detectats i correccion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</text:p>
            <text:p text:style-name="P172">- Rúbrica de qualitat de l'esquema i validació.</text:p>
            <text:p text:style-name="P172">- Checklist de casos de prova superats.</text:p>
            <text:p text:style-name="P172">- Observació del procés de depuració document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Esquema base parcial per alumnat amb més dificultat.</text:p>
            <text:p text:style-name="P176">- Validacions guiades amb exemples resolts.</text:p>
            <text:p text:style-name="P176">- Ampliació: control de versions dels esquem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