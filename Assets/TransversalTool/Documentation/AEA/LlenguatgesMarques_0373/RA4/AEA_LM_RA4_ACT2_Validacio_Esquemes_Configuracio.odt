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4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Validació d'esquemes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defineix un esquema de validació per als fitxers de configuració del projecte, comprova documents i registra errors de sintaxi i estructur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: Estableix mecanismes de validació de documents per a l'intercanvi d'informació utilitzant mètodes per definir-ne la sintaxi i l'estructura.</text:p>
          </table:table-cell>
          <table:table-cell table:style-name="TableCell43" table:number-columns-spanned="3">
            <text:p text:style-name="P44">- Estableix la necessitat de descriure la informació transmesa i les seves regles.</text:p>
            <text:p text:style-name="P44">- Identifica tecnologies relacionades amb la definició de documents.</text:p>
            <text:p text:style-name="P44">- Analitza l'estructura i la sintaxi específica utilitzada en la descripció.</text:p>
            <text:p text:style-name="P44">- Crea descripcions de documents.</text:p>
            <text:p text:style-name="P44">- Utilitza descripcions en l'elaboració i validació de documents.</text:p>
            <text:p text:style-name="P44">- Associa les descripcions amb els documents.</text:p>
            <text:p text:style-name="P44">- Utilitza eines específiques de validació.</text:p>
          </table:table-cell>
          <table:covered-table-cell/>
          <table:covered-table-cell/>
          <table:table-cell table:style-name="TableCell45" table:number-rows-spanned="3">
            <text:p text:style-name="P46">- Definició de regles d'estructura per documents d'intercanvi.</text:p>
            <text:p text:style-name="P46">- Esquemes de validació (JSON Schema / alternatives equivalents).</text:p>
            <text:p text:style-name="P46">- Procés de validació i tractament d'errors.</text:p>
            <text:p text:style-name="P46">- Documentació de criteris de qualitat del fitxer.</text:p>
          </table:table-cell>
          <table:table-cell table:style-name="TableCell47" table:number-columns-spanned="2" table:number-rows-spanned="3">
            <text:p text:style-name="P48">- Rigor</text:p>
            <text:p text:style-name="P48">- Competència digital</text:p>
            <text:p text:style-name="P48">- Resolució de problemes</text:p>
            <text:p text:style-name="P48">- Autonomia</text:p>
            <text:p text:style-name="P48">- Comunicació tècnic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bàsic de JSON i validació de sintax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problema de validació en configuracions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Estudi de cas</text:p>
          </table:table-cell>
          <table:table-cell table:style-name="TableCell97">
            <text:p text:style-name="P98">Exemple d'err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Disseny de regles i atributs obligatoris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50 min</text:p>
          </table:table-cell>
          <table:covered-table-cell/>
          <table:table-cell table:style-name="TableCell108">
            <text:p text:style-name="P109">Aprenentatge cooperatiu</text:p>
          </table:table-cell>
          <table:table-cell table:style-name="TableCell110">
            <text:p text:style-name="P111">Guia docent</text:p>
          </table:table-cell>
          <table:table-cell table:style-name="TableCell112">
            <text:p text:style-name="P113">Aula</text:p>
          </table:table-cell>
        </table:table-row>
        <table:table-row table:style-name="TableRow114">
          <table:table-cell table:style-name="TableCell115">
            <text:p text:style-name="P116">Creació d'esquema de validació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Editor + validador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Validació de diversos fitxers i registre d'errors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Proves</text:p>
          </table:table-cell>
          <table:table-cell table:style-name="TableCell136">
            <text:p text:style-name="P137">Dades de prova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Millora de l'esquema i revisió entre igual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conclusions.</text:p>
          </table:table-cell>
          <table:table-cell table:style-name="TableCell156">
            <text:p text:style-name="P157">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lantilla de configuració del projecte.</text:p>
            <text:p text:style-name="P168">- Guia d'esquemes de validació utilitzada al mòdul.</text:p>
            <text:p text:style-name="P168">- Informe breu d'errors detectats i correc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l'esquema i validació.</text:p>
            <text:p text:style-name="P172">- Checklist de casos de prova superats.</text:p>
            <text:p text:style-name="P172">- Observació del procés de depuració document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squema base parcial per alumnat amb més dificultat.</text:p>
            <text:p text:style-name="P176">- Validacions guiades amb exemples resolts.</text:p>
            <text:p text:style-name="P176">- Ampliació: control de versions dels esquem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