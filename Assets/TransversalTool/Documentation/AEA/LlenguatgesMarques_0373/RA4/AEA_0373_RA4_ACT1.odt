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4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Validació d'esquemes de config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Definició d'esquemes i validació de documents per garantir consistència estructur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4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4/AEA_0373_RA4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