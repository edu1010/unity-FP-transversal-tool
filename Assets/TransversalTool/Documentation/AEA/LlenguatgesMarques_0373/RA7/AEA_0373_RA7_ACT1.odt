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7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Integració/importació de dades a sistema de gest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Procés d'importació i exportació de dades de joc cap a un entorn de gestió simul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7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7/AEA_0373_RA7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