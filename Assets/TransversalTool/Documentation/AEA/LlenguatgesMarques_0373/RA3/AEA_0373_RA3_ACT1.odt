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Interacció de client amb document web de suport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Manipulació d'elements d'una pàgina de documentació del projecte amb scripts de cli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3/AEA_0373_RA3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