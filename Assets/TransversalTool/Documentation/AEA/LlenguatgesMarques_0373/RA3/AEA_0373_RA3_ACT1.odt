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373_RA3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Interacció de client amb document web de suport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Manipulació d'elements d'una pàgina de documentació del projecte amb scripts de clien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3</text:p>
          </table:table-cell>
          <table:table-cell table:style-name="TableCell43" table:number-columns-spanned="3">
            <text:p text:style-name="P44">- Defineix estructura i sintaxi correctes en documents d'intercanvi.</text:p>
            <text:p text:style-name="P44">- Aplica validació i/o transformació segons objectiu.</text:p>
            <text:p text:style-name="P44">- Demostra coherència semàntica de les dades processades.</text:p>
          </table:table-cell>
          <table:covered-table-cell/>
          <table:covered-table-cell/>
          <table:table-cell table:style-name="TableCell45" table:number-rows-spanned="3">
            <text:p text:style-name="P46">- JSON/XML/USS</text:p>
            <text:p text:style-name="P46">- Validació i transformació</text:p>
            <text:p text:style-name="P46">- Intercanvi de dades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LlenguatgesMarques_0373/RA3/AEA_0373_RA3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