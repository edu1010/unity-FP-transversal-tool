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Estils USS per a HUD (semblant CSS)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plicació d'estils en UI Toolkit utilitzant propietats i selectors equivalents a CS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2/AEA_0373_RA2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