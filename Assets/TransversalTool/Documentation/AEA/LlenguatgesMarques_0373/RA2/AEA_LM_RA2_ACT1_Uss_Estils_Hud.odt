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i sistemes de gestió d’informació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2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stils USS (similar CSS) per a HUD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treballa sintaxi i estils d’USS de Unity UI Toolkit com a paral·lel de CS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2: Utilitza llenguatges de marques per a la transmissió i presentació de informació a través del web analitzant l'estructura dels documents i identificant-ne els elements.</text:p>
          </table:table-cell>
          <table:table-cell table:style-name="TableCell43" table:number-columns-spanned="3">
            <text:p text:style-name="P44">- Identifica estructura i sintaxi d’estils.</text:p>
            <text:p text:style-name="P44">- Aplica estils coherents a elements d’interfície.</text:p>
            <text:p text:style-name="P44">- Valida sintaxi i selectors.</text:p>
          </table:table-cell>
          <table:covered-table-cell/>
          <table:covered-table-cell/>
          <table:table-cell table:style-name="TableCell45" table:number-rows-spanned="3">
            <text:p text:style-name="P46">- Selectors i propietats USS.</text:p>
            <text:p text:style-name="P46">- Relació USS/CSS.</text:p>
            <text:p text:style-name="P46">- Presentació visual d’informació.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Creativitat tècnica</text:p>
            <text:p text:style-name="P48">- Precisió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nocions bàsiques d’HTML/CSS o esti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CSS vs USS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mparació guiada</text:p>
          </table:table-cell>
          <table:table-cell table:style-name="TableCell97">
            <text:p text:style-name="P98">Projector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Lectura de plantilla USS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0 min</text:p>
          </table:table-cell>
          <table:covered-table-cell/>
          <table:table-cell table:style-name="TableCell108">
            <text:p text:style-name="P109">Anàlisi</text:p>
          </table:table-cell>
          <table:table-cell table:style-name="TableCell110">
            <text:p text:style-name="P111">HudStyleTemplate.uss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Implementació d’estils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i correcció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Test</text:p>
          </table:table-cell>
          <table:table-cell table:style-name="TableCell136">
            <text:p text:style-name="P137">Unity UI Toolkit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Revisió entre iguals</text:p>
          </table:table-cell>
          <table:table-cell table:style-name="TableCell143">
            <text:p text:style-name="P144">Parelles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Coavaluació</text:p>
          </table:table-cell>
          <table:table-cell table:style-name="TableCell149">
            <text:p text:style-name="P150">Checklist</text:p>
          </table:table-cell>
          <table:table-cell table:style-name="TableCell151">
            <text:p text:style-name="P152">Aula TIC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2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Rúbrica</text:p>
          </table:table-cell>
          <table:table-cell table:style-name="TableCell164">
            <text:p text:style-name="P165">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2_UssStyles.md</text:p>
            <text:p text:style-name="P168">- HudStyleTemplate.u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’estils</text:p>
            <text:p text:style-name="P172">- Checklist de sintaxi</text:p>
            <text:p text:style-name="P172">- Resultat visu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Exemple parcial d’estil</text:p>
            <text:p text:style-name="P176">- Suport visual pas a pas</text:p>
            <text:p text:style-name="P176">- Ampliació opcional: estat hov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Llenguatges Marques 0373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