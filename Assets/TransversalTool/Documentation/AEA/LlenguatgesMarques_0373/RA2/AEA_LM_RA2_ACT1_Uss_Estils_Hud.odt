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stils USS (similar CSS) per a HU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sintaxi i estils d’USS de Unity UI Toolkit com a paral·lel de CS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Utilitza llenguatges de marques per a la transmissió i presentació de informació a través del web analitzant l'estructura dels documents i identificant-ne els elements.</text:p>
          </table:table-cell>
          <table:table-cell table:style-name="TableCell43" table:number-columns-spanned="3">
            <text:p text:style-name="P44">- Identifica estructura i sintaxi d’estils.</text:p>
            <text:p text:style-name="P44">- Aplica estils coherents a elements d’interfície.</text:p>
            <text:p text:style-name="P44">- Valida sintaxi i selectors.</text:p>
          </table:table-cell>
          <table:covered-table-cell/>
          <table:covered-table-cell/>
          <table:table-cell table:style-name="TableCell45" table:number-rows-spanned="3">
            <text:p text:style-name="P46">- Selectors i propietats USS.</text:p>
            <text:p text:style-name="P46">- Relació USS/CSS.</text:p>
            <text:p text:style-name="P46">- Presentació visual d’informació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Creativitat tècnica</text:p>
            <text:p text:style-name="P48">- Precisió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’HTML/CSS o esti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CSS vs US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mpar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de plantilla USS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HudStyleTemplate.uss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’estil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i correc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Test</text:p>
          </table:table-cell>
          <table:table-cell table:style-name="TableCell136">
            <text:p text:style-name="P137">Unity UI Toolki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Revisió entre iguals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Checklist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2_UssStyles.md</text:p>
            <text:p text:style-name="P168">- HudStyleTemplate.u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’estils</text:p>
            <text:p text:style-name="P172">- Checklist de sintaxi</text:p>
            <text:p text:style-name="P172">- Resultat visu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xemple parcial d’estil</text:p>
            <text:p text:style-name="P176">- Suport visual pas a pas</text:p>
            <text:p text:style-name="P176">- Ampliació opcional: estat hov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