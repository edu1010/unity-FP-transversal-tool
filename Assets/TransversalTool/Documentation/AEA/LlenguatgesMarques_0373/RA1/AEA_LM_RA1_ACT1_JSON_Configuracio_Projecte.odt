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373 Llenguatges de marques i sistemes de gestió d’infor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LM_RA1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'activitat: Fitxer JSON de configuració del projecte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5 hores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L'alumnat completa i valida un fitxer JSON de configuració per al projecte Unity, identificant elements estructurals, sintaxi i bones pràctiques de format d'un llenguatge de marqu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 i ODS 9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1: Reconeix les característiques de llenguatges de marques analitzant i interpretant fragments de codi.</text:p>
          </table:table-cell>
          <table:table-cell table:style-name="TableCell43" table:number-columns-spanned="3">
            <text:p text:style-name="P44">- Identifica les característiques generals dels llenguatges de marques.</text:p>
            <text:p text:style-name="P44">- Reconeix els avantatges per al tractament de la informació.</text:p>
            <text:p text:style-name="P44">- Classifica els llenguatges de marques rellevants.</text:p>
            <text:p text:style-name="P44">- Diferencia els àmbits d'aplicació.</text:p>
            <text:p text:style-name="P44">- Reconeix la necessitat d'un llenguatge de marques de propòsit general.</text:p>
            <text:p text:style-name="P44">- Analitza característiques pròpies de diferents llenguatges de marques.</text:p>
            <text:p text:style-name="P44">- Identifica l'estructura d'un document i les regles sintàctiques.</text:p>
            <text:p text:style-name="P44">- Contrasta la necessitat de documents ben formats.</text:p>
            <text:p text:style-name="P44">- Identifica els avantatges dels espais de noms.</text:p>
          </table:table-cell>
          <table:covered-table-cell/>
          <table:covered-table-cell/>
          <table:table-cell table:style-name="TableCell45" table:number-rows-spanned="3">
            <text:p text:style-name="P46">- Estructura de documents JSON i regles sintàctiques.</text:p>
            <text:p text:style-name="P46">- Comparació entre JSON, XML i altres llenguatges de marques.</text:p>
            <text:p text:style-name="P46">- Validació de format i coherència de dades.</text:p>
            <text:p text:style-name="P46">- Interpretació de configuracions per a una aplicació real.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Pensament crític</text:p>
            <text:p text:style-name="P48">- Precisió i rigor</text:p>
            <text:p text:style-name="P48">- Autonomia</text:p>
            <text:p text:style-name="P48">- Treball cooperatiu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r components de programari o dades de manera fiable; resoldre incidències tècniques; treballar col·laborativament; documentar i comunicar solucions en context professional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tècnics en contextos reals, crear productes digitals funcionals, verificar-ne la qualitat i mantenir bones pràctiques de desenvolupament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nocions bàsiques de fitxers i sintaxi JSO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Introducció al paper del fitxer de configuració en Unity.</text:p>
          </table:table-cell>
          <table:table-cell table:style-name="TableCell91">
            <text:p text:style-name="P92">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</text:p>
          </table:table-cell>
          <table:table-cell table:style-name="TableCell99">
            <text:p text:style-name="P100">Aula</text:p>
          </table:table-cell>
        </table:table-row>
        <table:table-row table:style-name="TableRow101">
          <table:table-cell table:style-name="TableCell102">
            <text:p text:style-name="P103">Lectura guiada de la plantilla JSON.</text:p>
          </table:table-cell>
          <table:table-cell table:style-name="TableCell104">
            <text:p text:style-name="P105">Parelles</text:p>
          </table:table-cell>
          <table:table-cell table:style-name="TableCell106" table:number-columns-spanned="2">
            <text:p text:style-name="P107">40 min</text:p>
          </table:table-cell>
          <table:covered-table-cell/>
          <table:table-cell table:style-name="TableCell108">
            <text:p text:style-name="P109">Descobriment guiat</text:p>
          </table:table-cell>
          <table:table-cell table:style-name="TableCell110">
            <text:p text:style-name="P111">ConfigTemplate.json</text:p>
          </table:table-cell>
          <table:table-cell table:style-name="TableCell112">
            <text:p text:style-name="P113">Aula informàtica</text:p>
          </table:table-cell>
        </table:table-row>
        <table:table-row table:style-name="TableRow114">
          <table:table-cell table:style-name="TableCell115">
            <text:p text:style-name="P116">Compleció de camps obligatoris i valors coherents.</text:p>
          </table:table-cell>
          <table:table-cell table:style-name="TableCell117">
            <text:p text:style-name="P118">Individual</text:p>
          </table:table-cell>
          <table:table-cell table:style-name="TableCell119" table:number-columns-spanned="2">
            <text:p text:style-name="P120">70 min</text:p>
          </table:table-cell>
          <table:covered-table-cell/>
          <table:table-cell table:style-name="TableCell121">
            <text:p text:style-name="P122">Pràctica</text:p>
          </table:table-cell>
          <table:table-cell table:style-name="TableCell123">
            <text:p text:style-name="P124">Editor codi</text:p>
          </table:table-cell>
          <table:table-cell table:style-name="TableCell125">
            <text:p text:style-name="P126">Aula informàtica</text:p>
          </table:table-cell>
        </table:table-row>
        <table:table-row table:style-name="TableRow127">
          <table:table-cell table:style-name="TableCell128">
            <text:p text:style-name="P129">Validació sintàctica i correcció d'errors.</text:p>
          </table:table-cell>
          <table:table-cell table:style-name="TableCell130">
            <text:p text:style-name="P131">Individual</text:p>
          </table:table-cell>
          <table:table-cell table:style-name="TableCell132" table:number-columns-spanned="2">
            <text:p text:style-name="P133">50 min</text:p>
          </table:table-cell>
          <table:covered-table-cell/>
          <table:table-cell table:style-name="TableCell134">
            <text:p text:style-name="P135">Prova-error</text:p>
          </table:table-cell>
          <table:table-cell table:style-name="TableCell136">
            <text:p text:style-name="P137">Validador JSON</text:p>
          </table:table-cell>
          <table:table-cell table:style-name="TableCell138">
            <text:p text:style-name="P139">Aula informàtica</text:p>
          </table:table-cell>
        </table:table-row>
        <table:table-row table:style-name="TableRow140">
          <table:table-cell table:style-name="TableCell141">
            <text:p text:style-name="P142">Revisió per parelles i justificació de decisions.</text:p>
          </table:table-cell>
          <table:table-cell table:style-name="TableCell143">
            <text:p text:style-name="P144">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Coavaluació</text:p>
          </table:table-cell>
          <table:table-cell table:style-name="TableCell149">
            <text:p text:style-name="P150">Rúbrica</text:p>
          </table:table-cell>
          <table:table-cell table:style-name="TableCell151">
            <text:p text:style-name="P152">Aula</text:p>
          </table:table-cell>
        </table:table-row>
        <table:table-row table:style-name="TableRow153">
          <table:table-cell table:style-name="TableCell154">
            <text:p text:style-name="P155">Lliurament i tancament.</text:p>
          </table:table-cell>
          <table:table-cell table:style-name="TableCell156">
            <text:p text:style-name="P157">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Metacognició</text:p>
          </table:table-cell>
          <table:table-cell table:style-name="TableCell162">
            <text:p text:style-name="P163">Checklist</text:p>
          </table:table-cell>
          <table:table-cell table:style-name="TableCell164">
            <text:p text:style-name="P165">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Assets/TransversalTool/Documentation/Statements/Markup_RA1.md</text:p>
            <text:p text:style-name="P168">- Assets/TransversalTool/Templates/Student/Markup/ConfigTemplate.json</text:p>
            <text:p text:style-name="P168">- Assets/TransversalTool/Templates/Teacher/Markup/ConfigSolution.js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'avaluació:</text:p>
            <text:p text:style-name="P172">- Rúbrica de qualitat de fitxer JSON.</text:p>
            <text:p text:style-name="P172">- Checklist de validació sintàctica i semàntica.</text:p>
            <text:p text:style-name="P172">- Observació del procés de correcció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amb pistes de camps obligatoris.</text:p>
            <text:p text:style-name="P176">- Suport visual amb exemples de JSON correcte/incorrecte.</text:p>
            <text:p text:style-name="P176">- Ampliació: afegir bloc de configuració avançad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: Llenguatges Marques 0373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