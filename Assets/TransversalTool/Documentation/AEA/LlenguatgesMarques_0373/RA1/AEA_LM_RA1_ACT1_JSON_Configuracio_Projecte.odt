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(1r curs DAM/DAW)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LM_RA1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Fitxer JSON de configuració del projecte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5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completa i valida un fitxer JSON de configuració per al projecte Unity, identificant elements estructurals, sintaxi i bones pràctiques de format d'un llenguatge de marqu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: Reconeix les característiques de llenguatges de marques analitzant i interpretant fragments de codi.</text:p>
          </table:table-cell>
          <table:table-cell table:style-name="TableCell43" table:number-columns-spanned="3">
            <text:p text:style-name="P44">- Identifica les característiques generals dels llenguatges de marques.</text:p>
            <text:p text:style-name="P44">- Reconeix els avantatges per al tractament de la informació.</text:p>
            <text:p text:style-name="P44">- Classifica els llenguatges de marques rellevants.</text:p>
            <text:p text:style-name="P44">- Diferencia els àmbits d'aplicació.</text:p>
            <text:p text:style-name="P44">- Reconeix la necessitat d'un llenguatge de marques de propòsit general.</text:p>
            <text:p text:style-name="P44">- Analitza característiques pròpies de diferents llenguatges de marques.</text:p>
            <text:p text:style-name="P44">- Identifica l'estructura d'un document i les regles sintàctiques.</text:p>
            <text:p text:style-name="P44">- Contrasta la necessitat de documents ben formats.</text:p>
            <text:p text:style-name="P44">- Identifica els avantatges dels espais de noms.</text:p>
          </table:table-cell>
          <table:covered-table-cell/>
          <table:covered-table-cell/>
          <table:table-cell table:style-name="TableCell45" table:number-rows-spanned="3">
            <text:p text:style-name="P46">- Estructura de documents JSON i regles sintàctiques.</text:p>
            <text:p text:style-name="P46">- Comparació entre JSON, XML i altres llenguatges de marques.</text:p>
            <text:p text:style-name="P46">- Validació de format i coherència de dades.</text:p>
            <text:p text:style-name="P46">- Interpretació de configuracions per a una aplicació real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Pensament crític</text:p>
            <text:p text:style-name="P48">- Precisió i rigor</text:p>
            <text:p text:style-name="P48">- Autonomia</text:p>
            <text:p text:style-name="P48">- Treball cooperatiu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nocions bàsiques de fitxers i sintaxi JSO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Introducció al paper del fitxer de configuració en Unity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Lectura guiada de la plantilla JSON.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40 min</text:p>
          </table:table-cell>
          <table:covered-table-cell/>
          <table:table-cell table:style-name="TableCell108">
            <text:p text:style-name="P109">Descobriment guiat</text:p>
          </table:table-cell>
          <table:table-cell table:style-name="TableCell110">
            <text:p text:style-name="P111">ConfigTemplate.json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Compleció de camps obligatoris i valors coherents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70 min</text:p>
          </table:table-cell>
          <table:covered-table-cell/>
          <table:table-cell table:style-name="TableCell121">
            <text:p text:style-name="P122">Pràctica</text:p>
          </table:table-cell>
          <table:table-cell table:style-name="TableCell123">
            <text:p text:style-name="P124">Editor codi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Validació sintàctica i correcció d'errors.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50 min</text:p>
          </table:table-cell>
          <table:covered-table-cell/>
          <table:table-cell table:style-name="TableCell134">
            <text:p text:style-name="P135">Prova-error</text:p>
          </table:table-cell>
          <table:table-cell table:style-name="TableCell136">
            <text:p text:style-name="P137">Validador JSON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Revisió per parelles i justificació de decisions.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Rúbric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 i tancament.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Metacognició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Assets/TransversalTool/Documentation/Statements/Markup_RA1.md</text:p>
            <text:p text:style-name="P168">- Assets/TransversalTool/Templates/Student/Markup/ConfigTemplate.json</text:p>
            <text:p text:style-name="P168">- Assets/TransversalTool/Templates/Teacher/Markup/ConfigSolution.js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qualitat de fitxer JSON.</text:p>
            <text:p text:style-name="P172">- Checklist de validació sintàctica i semàntica.</text:p>
            <text:p text:style-name="P172">- Observació del procés de correc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amb pistes de camps obligatoris.</text:p>
            <text:p text:style-name="P176">- Suport visual amb exemples de JSON correcte/incorrecte.</text:p>
            <text:p text:style-name="P176">- Ampliació: afegir bloc de configuració avanç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