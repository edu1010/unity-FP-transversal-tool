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JSON de configuració del projecte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dentificació d'estructura i sintaxi en fitxers JSON de configuració de la too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1/AEA_0373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