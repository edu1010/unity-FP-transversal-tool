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373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Conversió JSON ↔ XML de dades de joc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Transformació entre formats d'intercanvi mantenint semàntica de la inform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Defineix estructura i sintaxi correctes en documents d'intercanvi.</text:p>
            <text:p text:style-name="P44">- Aplica validació i/o transformació segons objectiu.</text:p>
            <text:p text:style-name="P44">- Demostra coherència semàntica de les dades processades.</text:p>
          </table:table-cell>
          <table:covered-table-cell/>
          <table:covered-table-cell/>
          <table:table-cell table:style-name="TableCell45" table:number-rows-spanned="3">
            <text:p text:style-name="P46">- JSON/XML/USS</text:p>
            <text:p text:style-name="P46">- Validació i transformació</text:p>
            <text:p text:style-name="P46">- Intercanvi de dades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LlenguatgesMarques_0373/RA5/AEA_0373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