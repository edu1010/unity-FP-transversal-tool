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versió JSON ↔ XML de dades de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Transformació entre formats d'intercanvi mantenint semàntica de la inform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5/AEA_0373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