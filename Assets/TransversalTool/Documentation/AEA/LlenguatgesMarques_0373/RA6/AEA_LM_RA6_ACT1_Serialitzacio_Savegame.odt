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erialització JSON de partida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crea i valida un fitxer savegame.json preparat per ser guardat i recuperat en fases posteri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: Gestiona la informació en formats d'intercanvi de dades analitzant i utilitzant tecnologies d'emmagatzematge i llenguatges de consulta.</text:p>
          </table:table-cell>
          <table:table-cell table:style-name="TableCell43" table:number-columns-spanned="3">
            <text:p text:style-name="P44">- Identifica avantatges d’emmagatzemar dades en formats d’intercanvi.</text:p>
            <text:p text:style-name="P44">- Utilitza eines per validar i gestionar el document.</text:p>
            <text:p text:style-name="P44">- Manté coherència semàntica de les dades serialitzades.</text:p>
          </table:table-cell>
          <table:covered-table-cell/>
          <table:covered-table-cell/>
          <table:table-cell table:style-name="TableCell45" table:number-rows-spanned="3">
            <text:p text:style-name="P46">- Estructura de JSON de partida.</text:p>
            <text:p text:style-name="P46">- Validació sintàctica i semàntica.</text:p>
            <text:p text:style-name="P46">- Camps de persistència de joc.</text:p>
          </table:table-cell>
          <table:table-cell table:style-name="TableCell47" table:number-columns-spanned="2" table:number-rows-spanned="3">
            <text:p text:style-name="P48">- Rigor</text:p>
            <text:p text:style-name="P48">- Competència digital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de JSON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d’ús del savegame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15 min</text:p>
          </table:table-cell>
          <table:covered-table-cell/>
          <table:table-cell table:style-name="TableCell95">
            <text:p text:style-name="P96">Explicació</text:p>
          </table:table-cell>
          <table:table-cell table:style-name="TableCell97">
            <text:p text:style-name="P98">Exemple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Anàlisi plantilla JSON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5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SaveGameTemplate.json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Compleció del fitxer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 JSON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amb eina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3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Validador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Discussió de camps obligatoris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Debat</text:p>
          </table:table-cell>
          <table:table-cell table:style-name="TableCell149">
            <text:p text:style-name="P150">Pissarr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 TIC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Markup_RA6_Serialitzacio.md</text:p>
            <text:p text:style-name="P168">- SaveGameTemplate.j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JSON</text:p>
            <text:p text:style-name="P172">- Checklist de coherència</text:p>
            <text:p text:style-name="P172">- Observació del procé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camps mínims</text:p>
            <text:p text:style-name="P176">- Validació guiada</text:p>
            <text:p text:style-name="P176">- Extensió opcional: inventa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