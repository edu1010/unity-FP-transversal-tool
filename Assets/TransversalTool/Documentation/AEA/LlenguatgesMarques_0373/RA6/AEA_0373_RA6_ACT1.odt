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373 Llenguatges de marques i sistemes de gestió d’infor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373_RA6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Consulta de dades serialitzades de partida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Extracció i consulta d'informació de fitxers d'intercanvi i enllaç amb dades relacional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6</text:p>
          </table:table-cell>
          <table:table-cell table:style-name="TableCell43" table:number-columns-spanned="3">
            <text:p text:style-name="P44">- Defineix estructura i sintaxi correctes en documents d'intercanvi.</text:p>
            <text:p text:style-name="P44">- Aplica validació i/o transformació segons objectiu.</text:p>
            <text:p text:style-name="P44">- Demostra coherència semàntica de les dades processades.</text:p>
          </table:table-cell>
          <table:covered-table-cell/>
          <table:covered-table-cell/>
          <table:table-cell table:style-name="TableCell45" table:number-rows-spanned="3">
            <text:p text:style-name="P46">- JSON/XML/USS</text:p>
            <text:p text:style-name="P46">- Validació i transformació</text:p>
            <text:p text:style-name="P46">- Intercanvi de dades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LlenguatgesMarques_0373/RA6/AEA_0373_RA6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Llenguatges Marques 0373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